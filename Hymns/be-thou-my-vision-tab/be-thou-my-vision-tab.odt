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8585E1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Preformatted_20_Text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3pt" style:font-size-asian="13pt" style:font-size-complex="13pt"/>
    </style:style>
    <style:style style:name="P5" style:family="paragraph" style:parent-style-name="Preformatted_20_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font-size="13pt" officeooo:paragraph-rsid="0009d493" style:font-size-asian="13pt" style:font-size-complex="13pt"/>
    </style:style>
    <style:style style:name="P8" style:family="paragraph" style:parent-style-name="Preformatted_20_Text">
      <style:paragraph-properties fo:break-before="pag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style:use-window-font-color="true" loext:opacity="0%" fo:font-weight="bold" officeooo:rsid="00074ba4" style:font-weight-asian="bold" style:font-weight-complex="bold"/>
    </style:style>
    <style:style style:name="T6" style:family="text">
      <style:text-properties fo:color="#2a6099" loext:opacity="100%"/>
    </style:style>
    <style:style style:name="T7" style:family="text">
      <style:text-properties officeooo:rsid="000661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9484in, 5.6283in, 3.2071in, 4.75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e Thou My Vision (Blue Hymnal, #83)</text:span></text:p>
      <text:p text:style-name="P2">Words: Ancient Irish <text:s text:c="7"/>Music: Trad. Irish Melody</text:p>
      <text:p text:style-name="P3"/>
      <text:p text:style-name="P4"><text:span text:style-name="T2">[ CHORDS ] <text:s text:c="3"/></text:span><text:span text:style-name="T3">D <text:s text:c="6"/>Bm <text:s text:c="5"/>G <text:s text:c="6"/>A <text:s text:c="5"/></text:span><text:span text:style-name="T4"><text:s/>[ </text:span><text:span text:style-name="T5">NO </text:span><text:span text:style-name="T4">CAPO ]</text:span></text:p>
      <text:p text:style-name="P5"><text:s text:c="14"/>xoo=== <text:s/>====== <text:s/>==oo== <text:s/>oo===o</text:p>
      <text:p text:style-name="P5"><text:s text:c="14"/>|||||| <text:s/>|||||| <text:s/>|||||| <text:s/>||||||</text:p>
      <text:p text:style-name="P5"><text:s text:c="14"/>|||O|O <text:s/>OO|||O <text:s/>|O|||| <text:s/>||OOO|</text:p>
      <text:p text:style-name="P5"><text:s text:c="14"/>||||O| <text:s/>||||O| <text:s/>O|||OO <text:s/>||||||</text:p>
      <text:p text:style-name="P5"><text:s text:c="14"/>|||||| <text:s/>||OO|| <text:s/>|||||| <text:s/>||||||</text:p>
      <text:p text:style-name="P4"/>
      <text:p text:style-name="P4"><text:span text:style-name="T2">[ INTRO ] <text:s text:c="4"/></text:span><text:span text:style-name="T3">| D <text:s/>| Bm <text:s/>| G <text:s/>| D <text:s/>|</text:span></text:p>
      <text:p text:style-name="P4"/>
      <text:p text:style-name="P6">[ VERSE 1 ] <text:s text:c="2"/><text:span text:style-name="T6">D <text:s text:c="9"/>Bm <text:s text:c="8"/>G <text:s text:c="9"/>D</text:span></text:p>
      <text:p text:style-name="P4"><text:s text:c="14"/>Be Thou my <text:span text:style-name="T7">V</text:span>is-ion, O Lord of my heart;</text:p>
      <text:p text:style-name="P5"><text:s text:c="14"/>A <text:s text:c="24"/>G <text:s text:c="13"/>A</text:p>
      <text:p text:style-name="P4"><text:s text:c="14"/>Naught be all else to me, save that Thou art:</text:p>
      <text:p text:style-name="P5"><text:s text:c="14"/>Bm <text:s text:c="10"/>G <text:s text:c="10"/>D <text:s text:c="8"/>G <text:s text:c="2"/>A</text:p>
      <text:p text:style-name="P4"><text:s text:c="14"/>Thou my best thought, by day or by night,</text:p>
      <text:p text:style-name="P5"><text:s text:c="14"/>D <text:s text:c="9"/>Bm <text:s text:c="12"/>G <text:s text:c="11"/>D</text:p>
      <text:p text:style-name="P4"><text:s text:c="14"/>Wak-ing or sleep-ing, Thy pres-ence my light.</text:p>
      <text:p text:style-name="P4"><text:s/></text:p>
      <text:p text:style-name="P7"><text:span text:style-name="T2">[ VERSE 2 ] <text:s text:c="2"/></text:span><text:span text:style-name="T3">D <text:s text:c="9"/>Bm <text:s text:c="10"/>G <text:s text:c="11"/>D</text:span></text:p>
      <text:p text:style-name="P4"><text:s text:c="14"/>Be Thou my <text:span text:style-name="T7">W</text:span>is-dom, and Thou my true <text:span text:style-name="T7">W</text:span>ord;</text:p>
      <text:p text:style-name="P7"><text:s text:c="14"/><text:span text:style-name="T3">A <text:s text:c="21"/>G <text:s text:c="12"/>A</text:span></text:p>
      <text:p text:style-name="P4"><text:s text:c="14"/>I ev-er with Thee, and Thou with me, Lord:</text:p>
      <text:p text:style-name="P7"><text:s text:c="14"/><text:span text:style-name="T3">Bm <text:s text:c="11"/>G <text:s text:c="7"/>D <text:s text:c="9"/>G <text:s text:c="2"/>A</text:span></text:p>
      <text:p text:style-name="P4"><text:s text:c="14"/>Thou my great Fa-ther, I Thy true son,</text:p>
      <text:p text:style-name="P7"><text:s text:c="14"/><text:span text:style-name="T3">D <text:s text:c="9"/>Bm <text:s text:c="12"/>G <text:s text:c="10"/>D</text:span></text:p>
      <text:p text:style-name="P4"><text:s text:c="14"/>Thou in me dwell-ing, and I with Thee one.</text:p>
      <text:p text:style-name="P4"><text:s text:c="2"/></text:p>
      <text:p text:style-name="P7"><text:span text:style-name="T2">[ VERSE 3 ] <text:s text:c="2"/></text:span><text:span text:style-name="T3">D <text:s text:c="8"/>Bm <text:s text:c="11"/>G <text:s text:c="11"/>D</text:span></text:p>
      <text:p text:style-name="P4"><text:s text:c="14"/>Rich-es I heed not, nor man's emp-ty praise</text:p>
      <text:p text:style-name="P7"><text:s text:c="14"/><text:span text:style-name="T3">A <text:s text:c="23"/>G <text:s text:c="9"/>A</text:span></text:p>
      <text:p text:style-name="P4"><text:s text:c="14"/>Thou mine in-her-i-tance now and al-ways:</text:p>
      <text:p text:style-name="P7"><text:s text:c="14"/><text:span text:style-name="T3">Bm <text:s text:c="11"/>G <text:s text:c="5"/>D <text:s text:c="10"/>G <text:s text:c="2"/>A</text:span></text:p>
      <text:p text:style-name="P4"><text:s text:c="14"/>Thou and Thou on-ly, first in my heart</text:p>
      <text:p text:style-name="P7"><text:s text:c="14"/><text:span text:style-name="T3">D <text:s text:c="11"/>Bm <text:s text:c="9"/>G <text:s text:c="13"/>D</text:span></text:p>
      <text:p text:style-name="P4"><text:s text:c="14"/>High King of heav-en, my trea-sure Thou art.</text:p>
      <text:p text:style-name="P4"><text:s/></text:p>
      <text:p text:style-name="P7"><text:span text:style-name="T2">[ VERSE 4 ] <text:s text:c="2"/></text:span><text:span text:style-name="T3">D <text:s text:c="11"/>Bm <text:s text:c="9"/>G <text:s text:c="8"/>D</text:span></text:p>
      <text:p text:style-name="P4"><text:s text:c="14"/>High King of heav-en, my vic-t<text:span text:style-name="T7">o</text:span>-ry won,</text:p>
      <text:p text:style-name="P7"><text:s text:c="14"/><text:span text:style-name="T3">A <text:s text:c="26"/>G <text:s text:c="16"/>A</text:span></text:p>
      <text:p text:style-name="P4"><text:s text:c="14"/>May I reach heav-en's joys, O bright heav’n’s Sun!</text:p>
      <text:p text:style-name="P7"><text:s text:c="14"/><text:span text:style-name="T3">Bm <text:s text:c="9"/>G <text:s text:c="14"/>D <text:s text:c="7"/>G <text:s text:c="2"/>A</text:span></text:p>
      <text:p text:style-name="P4"><text:s text:c="14"/>Heart of my own heart, what-ev-er be-fall,</text:p>
      <text:p text:style-name="P7"><text:s text:c="14"/><text:span text:style-name="T3">D <text:s text:c="10"/>Bm <text:s text:c="8"/>G <text:s text:c="8"/>D</text:span></text:p>
      <text:p text:style-name="P4"><text:s text:c="14"/>Still be my <text:span text:style-name="T7">V</text:span>is-ion, O Rul-er of all.</text:p>
      <text:p text:style-name="Preformatted_20_Text"/>
      <text:p text:style-name="Preformatted_20_Text"/>
      <text:p text:style-name="P8"><draw:frame draw:style-name="fr1" draw:name="Image1" text:anchor-type="char" svg:x="0.3756in" svg:y="0.0228in" svg:width="6.6783in" svg:height="9.9925in" draw:z-index="0" draw:transform="translate (-3.71476377952756in -5.01909448818898in) rotate (3.14159265358979) translate (3.71476377952756in 5.01909448818898in)"><draw:image xlink:href="Pictures/10000000000009F600000CE48585E10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5-12T21:04:31.652523660</dc:date>
    <meta:editing-duration>PT2H10M42S</meta:editing-duration>
    <meta:editing-cycles>8</meta:editing-cycles>
    <meta:print-date>2024-07-30T14:45:30.438569959</meta:print-date>
    <meta:printed-by>PDF files</meta:printed-by>
    <meta:document-statistic meta:table-count="0" meta:image-count="1" meta:object-count="0" meta:page-count="2" meta:paragraph-count="44" meta:word-count="268" meta:character-count="2145" meta:non-whitespace-character-count="889"/>
  </office:meta>
</office:document-meta>
</file>