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FD53658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2pt" officeooo:paragraph-rsid="001a7f6c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19037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2pt" fo:font-weight="bold" officeooo:paragraph-rsid="001f6b6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paragraph-rsid="001f6b67" style:font-size-asian="12pt" style:font-size-complex="12pt"/>
    </style:style>
    <style:style style:name="P10" style:family="paragraph" style:parent-style-name="Preformatted_20_Text">
      <style:text-properties fo:font-size="12pt" officeooo:paragraph-rsid="001bc8f4" style:font-size-asian="12pt" style:font-size-complex="12pt"/>
    </style:style>
    <style:style style:name="P11" style:family="paragraph" style:parent-style-name="Preformatted_20_Text">
      <style:text-properties fo:font-size="12pt" fo:font-weight="bold" officeooo:rsid="001bc8f4" officeooo:paragraph-rsid="001f6b67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2a6099" loext:opacity="100%" fo:font-size="12pt" fo:font-weight="bold" officeooo:rsid="001dbbdb" officeooo:paragraph-rsid="001f6b67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bold" officeooo:rsid="001bc8f4" officeooo:paragraph-rsid="001bc8f4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font-size="12pt" officeooo:paragraph-rsid="001dbbdb" style:font-size-asian="12pt" style:font-size-complex="12pt"/>
    </style:style>
    <style:style style:name="P15" style:family="paragraph" style:parent-style-name="Preformatted_20_Text">
      <style:text-properties fo:font-size="12pt" fo:font-weight="normal" officeooo:rsid="001bc8f4" officeooo:paragraph-rsid="001f6b67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font-size="12pt" officeooo:paragraph-rsid="001e59b5" style:font-size-asian="12pt" style:font-size-complex="12pt"/>
    </style:style>
    <style:style style:name="P17" style:family="paragraph" style:parent-style-name="Preformatted_20_Text">
      <style:text-properties fo:color="#2a6099" loext:opacity="100%" fo:font-size="12pt" fo:font-weight="bold" officeooo:paragraph-rsid="001f6b67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officeooo:rsid="001bc8f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c8f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037b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2a6099" loext:opacity="100%" fo:font-weight="bold" officeooo:rsid="001dbbdb" style:font-weight-asian="bold" style:font-weight-complex="bold"/>
    </style:style>
    <style:style style:name="T9" style:family="text">
      <style:text-properties officeooo:rsid="001f6b67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1dbbdb"/>
    </style:style>
    <style:style style:name="T12" style:family="text">
      <style:text-properties fo:font-weight="normal" officeooo:rsid="001bc8f4" style:font-weight-asian="normal" style:font-weight-complex="normal"/>
    </style:style>
    <style:style style:name="T13" style:family="text">
      <style:text-properties fo:font-weight="normal" officeooo:rsid="001f6b67" style:font-weight-asian="normal" style:font-weight-complex="normal"/>
    </style:style>
    <style:style style:name="T14" style:family="text">
      <style:text-properties fo:font-weight="bold" officeooo:rsid="001bc8f4" style:font-weight-asian="bold" style:font-weight-complex="bold"/>
    </style:style>
    <style:style style:name="T15" style:family="text">
      <style:text-properties officeooo:rsid="001dbb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36in, 8.2638in, 8.8083in, 2.2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Know Whom I Have Believed</text:span><text:span text:style-name="T2"> (Blue Hymnal #</text:span><text:span text:style-name="T1">353</text:span><text:span text:style-name="T2">)</text:span></text:p>
      <text:p text:style-name="P2">Words: <text:span text:style-name="T3">Daniel W. Whittle</text:span> <text:s text:c="3"/>Music: J<text:span text:style-name="T3">ames McGranahan</text:span></text:p>
      <text:p text:style-name="P3"/>
      <text:p text:style-name="P4"><text:span text:style-name="T4">[ C</text:span><text:span text:style-name="T5">HORDS</text:span><text:span text:style-name="T4"> <text:s/>] <text:s text:c="6"/></text:span><text:span text:style-name="T6">D <text:s text:c="6"/>A <text:s text:c="6"/>G <text:s text:c="11"/></text:span><text:span text:style-name="T7">[ NO CAPO ]</text:span></text:p>
      <text:p text:style-name="P5"><text:s text:c="18"/>xoo=== <text:s/>====== <text:s/>oo===o</text:p>
      <text:p text:style-name="P6"><text:s text:c="18"/>|||||| <text:s/>|||||| <text:s/>||||||</text:p>
      <text:p text:style-name="P6"><text:s text:c="18"/>|||O|O <text:s/>||OOO| <text:s/>|O||||</text:p>
      <text:p text:style-name="P6"><text:s text:c="18"/>||||O| <text:s/>|||||| <text:s/>O|||OO</text:p>
      <text:p text:style-name="P7"/>
      <text:p text:style-name="P8">[ VERSE 1 ]</text:p>
      <text:p text:style-name="P9"><text:span text:style-name="T6"><text:s text:c="2"/>D <text:s text:c="52"/></text:span><text:span text:style-name="T8">A</text:span></text:p>
      <text:p text:style-name="P9"><text:span text:style-name="T3">I know not why God’s won-drous grace </text:span><text:span text:style-name="T9">t</text:span><text:span text:style-name="T3">o me He hath made known;</text:span></text:p>
      <text:p text:style-name="P9"><text:s text:c="4"/><text:span text:style-name="T8">D <text:s text:c="33"/>A <text:s text:c="16"/>D</text:span></text:p>
      <text:p text:style-name="P9"><text:span text:style-name="T3">Nor why, un-wor-thy, Christ in love </text:span><text:span text:style-name="T9">r</text:span><text:span text:style-name="T3">e-deemed me for His own <text:s text:c="12"/></text:span></text:p>
      <text:p text:style-name="P10"/>
      <text:p text:style-name="P11">[ CHORUS ]</text:p>
      <text:p text:style-name="P12">D <text:s text:c="5"/>G <text:s text:c="18"/>D <text:s text:c="20"/>A <text:s text:c="17"/>D</text:p>
      <text:p text:style-name="P9"><text:span text:style-name="T3">But “I know who</text:span><text:span text:style-name="T9">m</text:span><text:span text:style-name="T3"> I have be-liev-ed, </text:span><text:span text:style-name="T9">a</text:span><text:span text:style-name="T3">nd I am per-suad-ed that He is a-ble</text:span></text:p>
      <text:p text:style-name="P12"><text:s text:c="3"/>G <text:s text:c="23"/>D <text:s text:c="12"/>A <text:s text:c="16"/>D</text:p>
      <text:p text:style-name="P9"><text:span text:style-name="T3">To keep that which I’ve com-mit-ted </text:span><text:span text:style-name="T9">u</text:span><text:span text:style-name="T3">n-to Him a-gainst that day.”</text:span></text:p>
      <text:p text:style-name="P7"/>
      <text:p text:style-name="P8">[ VERSE 2 ]</text:p>
      <text:p text:style-name="P8"><text:span text:style-name="T10"><text:s text:c="2"/>D <text:s text:c="46"/></text:span><text:span text:style-name="T11">A</text:span></text:p>
      <text:p text:style-name="P9"><text:span text:style-name="T12">I know not how this sav-ing faith </text:span><text:span text:style-name="T13">t</text:span><text:span text:style-name="T12">o me he did im-part;</text:span></text:p>
      <text:p text:style-name="P9"><text:span text:style-name="T12"><text:s text:c="4"/></text:span><text:span text:style-name="T8">D <text:s text:c="34"/>A <text:s text:c="15"/>D</text:span></text:p>
      <text:p text:style-name="P9"><text:span text:style-name="T12">Nor how be-liev-ing in His Word </text:span><text:span text:style-name="T13">w</text:span><text:span text:style-name="T12">rought peace with-in my heart.</text:span></text:p>
      <text:p text:style-name="P7"/>
      <text:p text:style-name="P13">[ CHORUS ]</text:p>
      <text:p text:style-name="P10"><text:span text:style-name="T14"/></text:p>
      <text:p text:style-name="P14"><text:span text:style-name="T4">[ VERSE 3 ]</text:span></text:p>
      <text:p text:style-name="P15"><text:s text:c="2"/><text:span text:style-name="T6">D <text:s text:c="50"/></text:span><text:span text:style-name="T8">A</text:span></text:p>
      <text:p text:style-name="P9"><text:span text:style-name="T12">I know not how the Spir-it moves, </text:span><text:span text:style-name="T13">c</text:span><text:span text:style-name="T12">on-vinc-ing men of sin;</text:span></text:p>
      <text:p text:style-name="P9"><text:span text:style-name="T12"><text:s text:c="3"/></text:span><text:span text:style-name="T8">D <text:s text:c="36"/>A <text:s text:c="14"/>D</text:span></text:p>
      <text:p text:style-name="P15">Re-veal-ing Je-sus through the Word, <text:span text:style-name="T9">c</text:span>re-at-ing faith in Him.</text:p>
      <text:p text:style-name="P16"><text:span text:style-name="T12"/></text:p>
      <text:p text:style-name="P13">[ CHORUS ]</text:p>
      <text:p text:style-name="P10"><text:span text:style-name="T14"/></text:p>
      <text:p text:style-name="P8">[ VERSE 4 ]</text:p>
      <text:p text:style-name="P17"><text:s text:c="2"/>D <text:s text:c="51"/><text:span text:style-name="T15">A</text:span></text:p>
      <text:p text:style-name="P9"><text:span text:style-name="T12">I know not when my Lord may come, </text:span><text:span text:style-name="T13">a</text:span><text:span text:style-name="T12">t night or noon-day fair;</text:span></text:p>
      <text:p text:style-name="P9"><text:span text:style-name="T12"><text:s text:c="4"/></text:span><text:span text:style-name="T8">D <text:s text:c="34"/>A <text:s text:c="14"/>D</text:span></text:p>
      <text:p text:style-name="P15">Nor if I’ll walk the *vale with Him, <text:span text:style-name="T9">o</text:span>r meet Him in the air.</text:p>
      <text:p text:style-name="P16"><text:span text:style-name="T12"/></text:p>
      <text:p text:style-name="P13">[ CHORUS ]</text:p>
      <text:p text:style-name="P18"><draw:frame draw:style-name="fr1" draw:name="Image1" text:anchor-type="char" svg:x="0.3945in" svg:y="0.0118in" svg:width="6.5484in" svg:height="9.9827in" draw:z-index="0"><draw:image xlink:href="Pictures/10000000000009F600000CE4FD5365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6-01T23:38:25.973440579</dc:date>
    <meta:editing-duration>PT3H11M53S</meta:editing-duration>
    <meta:editing-cycles>11</meta:editing-cycles>
    <meta:print-date>2026-06-01T23:37:23.048033305</meta:print-date>
    <meta:printed-by>PDF files</meta:printed-by>
    <meta:document-statistic meta:table-count="0" meta:image-count="1" meta:object-count="0" meta:page-count="2" meta:paragraph-count="35" meta:word-count="215" meta:character-count="1609" meta:non-whitespace-character-count="771"/>
  </office:meta>
</office:document-meta>
</file>