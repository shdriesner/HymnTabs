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9F600000CE4D4C8581B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2" style:family="paragraph" style:parent-style-name="Preformatted_20_Text">
      <style:paragraph-properties fo:text-align="center" style:justify-single-word="false"/>
      <style:text-properties fo:font-size="8pt" style:font-size-asian="8pt" style:font-size-complex="8pt"/>
    </style:style>
    <style:style style:name="P3" style:family="paragraph" style:parent-style-name="Preformatted_20_Text">
      <style:text-properties fo:font-size="12pt" style:font-size-asian="12pt" style:font-size-complex="12pt"/>
    </style:style>
    <style:style style:name="P4" style:family="paragraph" style:parent-style-name="Preformatted_20_Text">
      <style:text-properties fo:font-size="13pt" officeooo:paragraph-rsid="000ffd45" style:font-size-asian="13pt" style:font-size-complex="13pt"/>
    </style:style>
    <style:style style:name="P5" style:family="paragraph" style:parent-style-name="Preformatted_20_Text">
      <style:text-properties fo:color="#2a6099" loext:opacity="100%" fo:font-size="13pt" fo:font-weight="bold" officeooo:paragraph-rsid="000ffd45" style:font-size-asian="13pt" style:font-weight-asian="bold" style:font-size-complex="13pt" style:font-weight-complex="bold"/>
    </style:style>
    <style:style style:name="P6" style:family="paragraph" style:parent-style-name="Preformatted_20_Text">
      <style:text-properties fo:font-size="13pt" style:font-size-asian="13pt" style:font-size-complex="13pt"/>
    </style:style>
    <style:style style:name="P7" style:family="paragraph" style:parent-style-name="Preformatted_20_Text">
      <style:text-properties fo:font-size="13pt" fo:font-weight="bold" style:font-size-asian="13pt" style:font-weight-asian="bold" style:font-size-complex="13pt" style:font-weight-complex="bold"/>
    </style:style>
    <style:style style:name="P8" style:family="paragraph" style:parent-style-name="Preformatted_20_Text">
      <style:text-properties fo:color="#2a6099" loext:opacity="100%" fo:font-size="13pt" fo:font-weight="bold" style:font-size-asian="13pt" style:font-weight-asian="bold" style:font-size-complex="13pt" style:font-weight-complex="bold"/>
    </style:style>
    <style:style style:name="P9" style:family="paragraph" style:parent-style-name="Preformatted_20_Text">
      <style:text-properties fo:font-size="13pt" fo:font-weight="bold" officeooo:paragraph-rsid="000f8cdb" style:font-size-asian="13pt" style:font-weight-asian="bold" style:font-size-complex="13pt" style:font-weight-complex="bold"/>
    </style:style>
    <style:style style:name="P10" style:family="paragraph" style:parent-style-name="Preformatted_20_Text">
      <style:text-properties fo:font-size="13pt" officeooo:paragraph-rsid="000fe0b7" style:font-size-asian="13pt" style:font-size-complex="13pt"/>
    </style:style>
    <style:style style:name="P11" style:family="paragraph" style:parent-style-name="Preformatted_20_Text">
      <style:text-properties fo:font-size="13pt" officeooo:paragraph-rsid="000f8cdb" style:font-size-asian="13pt" style:font-size-complex="13pt"/>
    </style:style>
    <style:style style:name="P12" style:family="paragraph" style:parent-style-name="Preformatted_20_Text">
      <style:text-properties style:use-window-font-color="true" loext:opacity="0%" fo:font-size="13pt" fo:font-weight="normal" officeooo:rsid="000f8cdb" officeooo:paragraph-rsid="000f8cdb" style:font-size-asian="13pt" style:font-weight-asian="normal" style:font-size-complex="13pt" style:font-weight-complex="normal"/>
    </style:style>
    <style:style style:name="P13" style:family="paragraph" style:parent-style-name="Preformatted_20_Text">
      <style:paragraph-properties fo:break-before="page"/>
    </style:style>
    <style:style style:name="T1" style:family="text">
      <style:text-properties officeooo:rsid="000ed5cb"/>
    </style:style>
    <style:style style:name="T2" style:family="text">
      <style:text-properties officeooo:rsid="000f8cdb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2a6099" loext:opacity="100%" fo:font-weight="bold" style:font-weight-asian="bold" style:font-weight-complex="bold"/>
    </style:style>
    <style:style style:name="T5" style:family="text">
      <style:text-properties fo:color="#2a6099" loext:opacity="100%" fo:font-weight="bold" officeooo:rsid="000ffd45" style:font-weight-asian="bold" style:font-weight-complex="bold"/>
    </style:style>
    <style:style style:name="T6" style:family="text">
      <style:text-properties style:use-window-font-color="true" loext:opacity="0%" fo:font-weight="bold" style:font-weight-asian="bold" style:font-weight-complex="bold"/>
    </style:style>
    <style:style style:name="T7" style:family="text">
      <style:text-properties style:use-window-font-color="true" loext:opacity="0%" fo:font-weight="bold" officeooo:rsid="00074ba4" style:font-weight-asian="bold" style:font-weight-complex="bold"/>
    </style:style>
    <style:style style:name="T8" style:family="text">
      <style:text-properties officeooo:rsid="000ffd45"/>
    </style:style>
    <style:style style:name="T9" style:family="text">
      <style:text-properties fo:color="#2a6099" loext:opacity="100%" fo:font-weight="bold" officeooo:rsid="000fe0b7" style:font-weight-asian="bold" style:font-weight-complex="bold"/>
    </style:style>
    <style:style style:name="T10" style:family="text">
      <style:text-properties fo:color="#2a6099" loext:opacity="100%" officeooo:rsid="000f8cdb"/>
    </style:style>
    <style:style style:name="T11" style:family="text">
      <style:text-properties fo:color="#2a6099" loext:opacity="100%" officeooo:rsid="000fe0b7"/>
    </style:style>
    <style:style style:name="T12" style:family="text">
      <style:text-properties officeooo:rsid="000fe0b7"/>
    </style:style>
    <style:style style:name="T13" style:family="text">
      <style:text-properties fo:color="#2a6099" loext:opacity="100%"/>
    </style:style>
    <style:style style:name="T14" style:family="text">
      <style:text-properties fo:color="#2a6099" loext:opacity="100%" fo:font-weight="bold" officeooo:rsid="000f8cdb" style:font-weight-asian="bold" style:font-weight-complex="bold"/>
    </style:style>
    <style:style style:name="T15" style:family="text">
      <style:text-properties fo:font-weight="bold" officeooo:rsid="000f8cdb" style:font-weight-asian="bold" style:font-weight-complex="bold"/>
    </style:style>
    <style:style style:name="T16" style:family="text">
      <style:text-properties style:use-window-font-color="true" loext:opacity="0%" fo:font-weight="normal" officeooo:rsid="000f8cdb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8902in, 7.8043in, 9.098in, 3.0047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I Need Thee Every Hour </text:span>(Blue Hymnal, #<text:span text:style-name="T1">42</text:span>3)</text:p>
      <text:p text:style-name="P2">Words: <text:span text:style-name="T2">Annie S. Hawks</text:span> <text:s text:c="7"/>Music: <text:span text:style-name="T2">Robert Lowry</text:span></text:p>
      <text:p text:style-name="P3"/>
      <text:p text:style-name="P4"><text:span text:style-name="T3">[ CHORDS ] <text:s text:c="3"/></text:span><text:span text:style-name="T4">G <text:s text:c="6"/></text:span><text:span text:style-name="T5">C9</text:span><text:span text:style-name="T4"> <text:s text:c="5"/></text:span><text:span text:style-name="T5">D</text:span><text:span text:style-name="T4"> <text:s text:c="6"/></text:span><text:span text:style-name="T4">A <text:s text:c="5"/></text:span><text:span text:style-name="T6"><text:s/>[ </text:span><text:span text:style-name="T7">NO </text:span><text:span text:style-name="T6">CAPO ]</text:span></text:p>
      <text:p text:style-name="P5"><text:s text:c="14"/>==oo== <text:s/><text:span text:style-name="T8">o</text:span>=<text:span text:style-name="T8">=</text:span>oo= <text:s/><text:span text:style-name="T8">x</text:span>oo<text:span text:style-name="T8">=</text:span>== <text:s/>oo===o</text:p>
      <text:p text:style-name="P5"><text:s text:c="14"/>|||||| <text:s/>|||||| <text:s/>|||||| <text:s/>||||||</text:p>
      <text:p text:style-name="P5"><text:s text:c="14"/><text:span text:style-name="T2">|</text:span>O|||| <text:s/>||<text:span text:style-name="T8">O</text:span>||| <text:s/>|||<text:span text:style-name="T8">O</text:span>|<text:span text:style-name="T8">O</text:span> <text:s/>||OOO|</text:p>
      <text:p text:style-name="P5"><text:s text:c="14"/>O|||OO <text:s/>|<text:span text:style-name="T8">O</text:span>||<text:span text:style-name="T8">OO</text:span> <text:s/>||||<text:span text:style-name="T8">O</text:span>| <text:s/>||||||</text:p>
      <text:p text:style-name="P6"/>
      <text:p text:style-name="P4"><text:span text:style-name="T3">[ INTRO ] <text:s text:c="4"/></text:span><text:span text:style-name="T4">| </text:span><text:span text:style-name="T9">C9 <text:s/></text:span><text:span text:style-name="T5">| </text:span><text:span text:style-name="T9">G <text:s/></text:span><text:span text:style-name="T5">| </text:span><text:span text:style-name="T9">G D <text:s/></text:span><text:span text:style-name="T5">|</text:span><text:span text:style-name="T9"> G </text:span><text:span text:style-name="T4"><text:s/>|</text:span></text:p>
      <text:p text:style-name="P6"/>
      <text:p text:style-name="P7">[ VERSE 1 ] <text:s text:c="4"/><text:span text:style-name="T10">G <text:s text:c="26"/></text:span><text:span text:style-name="T11">C9 <text:s text:c="7"/>G</text:span></text:p>
      <text:p text:style-name="P6"><text:s text:c="14"/><text:span text:style-name="T2">I need Thee ev-’ry hour, most gra-cious Lord;</text:span></text:p>
      <text:p text:style-name="P8"><text:s text:c="17"/><text:span text:style-name="T12">D <text:s text:c="17"/>G <text:s text:c="8"/>D <text:s text:c="4"/>A <text:s/>D</text:span></text:p>
      <text:p text:style-name="P6"><text:s text:c="14"/><text:span text:style-name="T2">No ten-der voice like Thine can peace af-ford.</text:span></text:p>
      <text:p text:style-name="P6"/>
      <text:p text:style-name="P9">[ <text:span text:style-name="T2">CHORUS</text:span> ] <text:s text:c="5"/><text:span text:style-name="T13">G <text:s text:c="13"/></text:span><text:span text:style-name="T11">D <text:s text:c="9"/>D <text:s text:c="12"/>G</text:span></text:p>
      <text:p text:style-name="P6"><text:s text:c="14"/><text:span text:style-name="T2">I need Thee, O I need Thee, ev-’ry hour I need Thee!</text:span></text:p>
      <text:p text:style-name="P8"><text:s text:c="16"/><text:span text:style-name="T12">C9 <text:s text:c="14"/>G <text:s text:c="9"/>G <text:s text:c="3"/>D <text:s/>G</text:span></text:p>
      <text:p text:style-name="P6"><text:s text:c="14"/><text:span text:style-name="T2">O bless me now, my Sav-ior, I come to Thee.</text:span></text:p>
      <text:p text:style-name="P6"><text:s/></text:p>
      <text:p text:style-name="P10"><text:span text:style-name="T3">[ VERSE 2 ] <text:s text:c="4"/></text:span><text:span text:style-name="T14">G <text:s text:c="26"/></text:span><text:span text:style-name="T9">C9 <text:s text:c="7"/>G</text:span></text:p>
      <text:p text:style-name="P11"><text:s text:c="14"/><text:span text:style-name="T2">I need Thee ev-’ry hour, stay Thou near-by;</text:span></text:p>
      <text:p text:style-name="P10"><text:s text:c="19"/><text:span text:style-name="T9">D <text:s text:c="18"/>G <text:s text:c="9"/>D <text:s text:c="3"/>A <text:s text:c="2"/>D</text:span></text:p>
      <text:p text:style-name="P6"><text:s text:c="14"/><text:span text:style-name="T2">Temp-ta-tions lose their pow’r when Thou art nigh.</text:span></text:p>
      <text:p text:style-name="P6"/>
      <text:p text:style-name="P9">[ <text:span text:style-name="T2">CHORUS</text:span> ]</text:p>
      <text:p text:style-name="P9"/>
      <text:p text:style-name="P10"><text:span text:style-name="T3">[ VERSE 3 ] <text:s text:c="4"/></text:span><text:span text:style-name="T14">G <text:s text:c="24"/></text:span><text:span text:style-name="T9">C9 <text:s text:c="4"/>G</text:span></text:p>
      <text:p text:style-name="P11"><text:s text:c="14"/><text:span text:style-name="T2">I need Thee ev-’ry hour, in joy or pain;</text:span></text:p>
      <text:p text:style-name="P10"><text:s text:c="19"/><text:span text:style-name="T9">D <text:s text:c="13"/>G <text:s text:c="7"/>D <text:s text:c="3"/>A <text:s/>D</text:span></text:p>
      <text:p text:style-name="P6"><text:s text:c="14"/><text:span text:style-name="T2">Come quick-ly and a-bide, or life is vain.</text:span></text:p>
      <text:p text:style-name="P9"/>
      <text:p text:style-name="P9">[ <text:span text:style-name="T2">CHORUS</text:span> ]</text:p>
      <text:p text:style-name="P9"><text:span text:style-name="T4"/></text:p>
      <text:p text:style-name="P10"><text:span text:style-name="T3">[ VERSE 4 ] <text:s text:c="4"/></text:span><text:span text:style-name="T14">G <text:s text:c="27"/></text:span><text:span text:style-name="T9">C9 <text:s text:c="4"/>G</text:span></text:p>
      <text:p text:style-name="P11"><text:s text:c="14"/><text:span text:style-name="T2">I need Thee ev-’ry hour, teach me Thy will;</text:span></text:p>
      <text:p text:style-name="P10"><text:s text:c="18"/><text:span text:style-name="T9">D <text:s text:c="12"/>G <text:s text:c="6"/>D <text:s/>A <text:s text:c="2"/>D</text:span></text:p>
      <text:p text:style-name="P6"><text:s text:c="14"/><text:span text:style-name="T2">Thy prom-is-es so rich in me ful-fill.</text:span></text:p>
      <text:p text:style-name="P9"/>
      <text:p text:style-name="P9">[ <text:span text:style-name="T2">CHORUS</text:span> ]</text:p>
      <text:p text:style-name="P11"><text:s/></text:p>
      <text:p text:style-name="P10"><text:span text:style-name="T3">[ VERSE </text:span><text:span text:style-name="T15">5</text:span><text:span text:style-name="T3"> ] <text:s text:c="4"/></text:span><text:span text:style-name="T14">G <text:s text:c="26"/></text:span><text:span text:style-name="T9">C9 <text:s text:c="3"/>G</text:span></text:p>
      <text:p text:style-name="P11"><text:s text:c="14"/><text:span text:style-name="T2">I need Thee ev-’ry hour, most Ho-ly One;</text:span></text:p>
      <text:p text:style-name="P10"><text:s text:c="16"/><text:span text:style-name="T9">D <text:s text:c="15"/>G <text:s text:c="9"/>D <text:s text:c="4"/>A <text:s/>D</text:span></text:p>
      <text:p text:style-name="P11"><text:span text:style-name="T4"><text:s text:c="14"/></text:span><text:span text:style-name="T16">O make me Thine in-deed, Thou bless-ed Son.</text:span></text:p>
      <text:p text:style-name="P12"/>
      <text:p text:style-name="P9">[ CHORUS ]</text:p>
      <text:p text:style-name="P13"><draw:frame draw:style-name="fr1" draw:name="Image1" text:anchor-type="char" svg:x="0.4299in" svg:y="0.0016in" svg:width="6.4602in" svg:height="10.0008in" draw:z-index="0"><draw:image xlink:href="Pictures/10000000000009F600000CE4D4C8581B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6.2$Linux_X86_64 LibreOffice_project/520$Build-2</meta:generator>
    <dc:date>2026-05-19T19:11:50.745346807</dc:date>
    <meta:editing-duration>PT2H52M59S</meta:editing-duration>
    <meta:editing-cycles>13</meta:editing-cycles>
    <meta:print-date>2024-07-30T14:45:30.438569959</meta:print-date>
    <meta:printed-by>PDF files</meta:printed-by>
    <meta:document-statistic meta:table-count="0" meta:image-count="1" meta:object-count="0" meta:page-count="2" meta:paragraph-count="38" meta:word-count="242" meta:character-count="1740" meta:non-whitespace-character-count="774"/>
  </office:meta>
</office:document-meta>
</file>