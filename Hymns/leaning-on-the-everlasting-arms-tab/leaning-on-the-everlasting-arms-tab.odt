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41CBF38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Preformatted_20_Text">
      <style:text-properties fo:font-size="10.5pt" style:font-size-asian="10.5pt" style:font-size-complex="10.5pt"/>
    </style:style>
    <style:style style:name="P4" style:family="paragraph" style:parent-style-name="Preformatted_20_Text">
      <style:text-properties fo:font-size="12pt" officeooo:paragraph-rsid="001a7f6c" style:font-size-asian="12pt" style:font-size-complex="12pt"/>
    </style:style>
    <style:style style:name="P5" style:family="paragraph" style:parent-style-name="Preformatted_20_Text">
      <style:text-properties fo:color="#2a6099" loext:opacity="100%" fo:font-size="12pt" fo:font-weight="bold" officeooo:paragraph-rsid="002acf56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style:font-size-asian="12pt" style:font-size-complex="12pt"/>
    </style:style>
    <style:style style:name="P7" style:family="paragraph" style:parent-style-name="Preformatted_20_Text">
      <style:text-properties fo:font-size="12pt" officeooo:paragraph-rsid="001f6b67" style:font-size-asian="12pt" style:font-size-complex="12pt"/>
    </style:style>
    <style:style style:name="P8" style:family="paragraph" style:parent-style-name="Preformatted_20_Text">
      <style:text-properties fo:font-size="12pt" officeooo:rsid="002acf56" officeooo:paragraph-rsid="002d27ad" style:font-size-asian="12pt" style:font-size-complex="12pt"/>
    </style:style>
    <style:style style:name="P9" style:family="paragraph" style:parent-style-name="Preformatted_20_Text">
      <style:text-properties fo:font-size="12pt" officeooo:paragraph-rsid="002d27ad" style:font-size-asian="12pt" style:font-size-complex="12pt"/>
    </style:style>
    <style:style style:name="P10" style:family="paragraph" style:parent-style-name="Preformatted_20_Text">
      <style:text-properties fo:color="#2a6099" loext:opacity="100%" fo:font-size="12pt" fo:font-weight="bold" officeooo:rsid="002acf56" officeooo:paragraph-rsid="002d27ad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color="#2a6099" loext:opacity="100%" fo:font-size="12pt" fo:font-weight="bold" officeooo:rsid="0025def4" officeooo:paragraph-rsid="0025def4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font-size="12pt" fo:font-weight="bold" officeooo:paragraph-rsid="002acf56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fo:font-size="12pt" officeooo:rsid="002acf56" officeooo:paragraph-rsid="002acf56" style:font-size-asian="12pt" style:font-size-complex="12pt"/>
    </style:style>
    <style:style style:name="P14" style:family="paragraph" style:parent-style-name="Preformatted_20_Text">
      <style:text-properties fo:font-size="12pt" fo:font-style="italic" officeooo:rsid="002acf56" officeooo:paragraph-rsid="002acf56" style:font-size-asian="12pt" style:font-style-asian="italic" style:font-size-complex="12pt" style:font-style-complex="italic"/>
    </style:style>
    <style:style style:name="P15" style:family="paragraph" style:parent-style-name="Preformatted_20_Text">
      <style:text-properties fo:font-size="12pt" fo:font-style="italic" officeooo:rsid="002acf56" officeooo:paragraph-rsid="002d27ad" style:font-size-asian="12pt" style:font-style-asian="italic" style:font-size-complex="12pt" style:font-style-complex="italic"/>
    </style:style>
    <style:style style:name="P16" style:family="paragraph" style:parent-style-name="Preformatted_20_Text">
      <style:text-properties fo:color="#2a6099" loext:opacity="100%" fo:font-size="12pt" fo:font-weight="bold" officeooo:rsid="0025def4" officeooo:paragraph-rsid="002d27ad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style:use-window-font-color="true" loext:opacity="0%" fo:font-size="12pt" fo:font-weight="normal" officeooo:rsid="002acf56" officeooo:paragraph-rsid="002d27ad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fo:font-size="12pt" fo:font-weight="bold" officeooo:paragraph-rsid="002d27ad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fo:color="#2a6099" loext:opacity="100%" fo:font-size="12pt" fo:font-weight="bold" officeooo:rsid="0025def4" officeooo:paragraph-rsid="002b5a57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fo:font-size="12pt" fo:font-weight="bold" officeooo:paragraph-rsid="002b5a57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fo:font-size="12pt" officeooo:paragraph-rsid="002fd076" style:font-size-asian="12pt" style:font-size-complex="12pt"/>
    </style:style>
    <style:style style:name="P22" style:family="paragraph" style:parent-style-name="Preformatted_20_Text">
      <style:text-properties style:use-window-font-color="true" loext:opacity="0%" fo:font-size="12pt" fo:font-weight="normal" officeooo:rsid="0025def4" officeooo:paragraph-rsid="0025def4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break-before="page"/>
      <style:text-properties officeooo:paragraph-rsid="0025def4"/>
    </style:style>
    <style:style style:name="T1" style:family="text">
      <style:text-properties style:text-underline-style="solid" style:text-underline-width="auto" style:text-underline-color="font-color" officeooo:rsid="002acf5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acf5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037b" style:font-weight-asian="bold" style:font-weight-complex="bold"/>
    </style:style>
    <style:style style:name="T6" style:family="text">
      <style:text-properties fo:color="#2a6099" loext:opacity="100%" fo:font-weight="bold" officeooo:rsid="0025def4" style:font-weight-asian="bold" style:font-weight-complex="bold"/>
    </style:style>
    <style:style style:name="T7" style:family="text">
      <style:text-properties fo:color="#2a6099" loext:opacity="100%" fo:font-weight="bold" style:font-weight-asian="bold" style:font-weight-complex="bold"/>
    </style:style>
    <style:style style:name="T8" style:family="text">
      <style:text-properties fo:color="#2a6099" loext:opacity="100%" fo:font-weight="bold" officeooo:rsid="002acf56" style:font-weight-asian="bold" style:font-weight-complex="bold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style:use-window-font-color="true" loext:opacity="0%" fo:font-weight="bold" officeooo:rsid="002acf56" style:font-weight-asian="bold" style:font-weight-complex="bold"/>
    </style:style>
    <style:style style:name="T11" style:family="text">
      <style:text-properties officeooo:rsid="0025def4"/>
    </style:style>
    <style:style style:name="T12" style:family="text">
      <style:text-properties style:use-window-font-color="true" loext:opacity="0%" fo:font-weight="normal" style:font-weight-asian="normal" style:font-weight-complex="normal"/>
    </style:style>
    <style:style style:name="T13" style:family="text">
      <style:text-properties fo:color="#2a6099" loext:opacity="100%" fo:font-weight="bold" officeooo:rsid="002fd076" style:font-weight-asian="bold" style:font-weight-complex="bold"/>
    </style:style>
    <style:style style:name="T14" style:family="text">
      <style:text-properties fo:color="#2a6099" loext:opacity="100%" officeooo:rsid="0025def4"/>
    </style:style>
    <style:style style:name="T15" style:family="text">
      <style:text-properties fo:color="#2a6099" loext:opacity="100%"/>
    </style:style>
    <style:style style:name="T16" style:family="text">
      <style:text-properties fo:color="#2a6099" loext:opacity="100%" officeooo:rsid="002acf56"/>
    </style:style>
    <style:style style:name="T17" style:family="text">
      <style:text-properties style:use-window-font-color="true" loext:opacity="0%" fo:font-weight="normal" officeooo:rsid="002acf56" style:font-weight-asian="normal" style:font-weight-complex="normal"/>
    </style:style>
    <style:style style:name="T18" style:family="text">
      <style:text-properties officeooo:rsid="002d27ad"/>
    </style:style>
    <style:style style:name="T19" style:family="text">
      <style:text-properties officeooo:rsid="002b5a57"/>
    </style:style>
    <style:style style:name="T20" style:family="text">
      <style:text-properties style:use-window-font-color="true" loext:opacity="0%" fo:font-weight="normal" officeooo:rsid="002b5a57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2ce8ed"/>
    </style:style>
    <style:style style:name="T23" style:family="text">
      <style:text-properties style:use-window-font-color="true" loext:opacity="0%" fo:font-weight="normal" officeooo:rsid="002ce8e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61in, 4.611in, 8.9055in, 6.0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aning On the Everlasting Arms</text:span><text:span text:style-name="T2"> (Blue Hymnal #</text:span><text:span text:style-name="T1">453</text:span><text:span text:style-name="T2">)</text:span></text:p>
      <text:p text:style-name="P2">Words: <text:span text:style-name="T3">Elisha A. Hoffman</text:span> <text:s text:c="2"/>Music: <text:span text:style-name="T3">Anthony J. Showalter</text:span></text:p>
      <text:p text:style-name="P3"/>
      <text:p text:style-name="P4"><text:span text:style-name="T4">[ C</text:span><text:span text:style-name="T5">HORDS</text:span><text:span text:style-name="T4"> <text:s/>] <text:s text:c="6"/></text:span><text:span text:style-name="T6">G</text:span><text:span text:style-name="T7"> <text:s text:c="6"/></text:span><text:span text:style-name="T6">C9 <text:s text:c="5"/></text:span><text:span text:style-name="T8">D</text:span><text:span text:style-name="T7"> <text:s text:c="10"/></text:span><text:span text:style-name="T9">[ </text:span><text:span text:style-name="T10">NO CAPO</text:span><text:span text:style-name="T9"> ]</text:span></text:p>
      <text:p text:style-name="P5"><text:s text:c="18"/><text:span text:style-name="T11">==</text:span>oo=<text:span text:style-name="T11">=</text:span> <text:s/>o<text:span text:style-name="T11">==</text:span>o== <text:s/><text:span text:style-name="T3">x</text:span>o<text:span text:style-name="T3">o</text:span>==<text:span text:style-name="T3">=</text:span></text:p>
      <text:p text:style-name="P5"><text:s text:c="18"/>|||||| <text:s/>|||||| <text:s/>||||||</text:p>
      <text:p text:style-name="P5"><text:s text:c="18"/>|O|||| <text:s/><text:span text:style-name="T3">|</text:span>|<text:span text:style-name="T11">O|</text:span>|<text:span text:style-name="T11">| <text:s/>|||</text:span><text:span text:style-name="T3">O</text:span><text:span text:style-name="T11">|</text:span><text:span text:style-name="T3">O</text:span></text:p>
      <text:p text:style-name="P5"><text:s text:c="18"/>O|||OO <text:s/>|<text:span text:style-name="T11">O</text:span>||O<text:span text:style-name="T11">O <text:s/>||||</text:span><text:span text:style-name="T3">O</text:span><text:span text:style-name="T11">|</text:span></text:p>
      <text:p text:style-name="P6"/>
      <text:p text:style-name="P7"><text:span text:style-name="T4">[ VERSE 1 ] <text:s text:c="2"/></text:span><text:span text:style-name="T6">G</text:span><text:span text:style-name="T7"> <text:s text:c="19"/></text:span><text:span text:style-name="T8">C9</text:span></text:p>
      <text:p text:style-name="P8"><text:s text:c="14"/>What a fel-low-ship, what a joy di-vine</text:p>
      <text:p text:style-name="P9"><text:span text:style-name="T7"><text:s text:c="14"/>G <text:s text:c="28"/>D</text:span></text:p>
      <text:p text:style-name="P8"><text:s text:c="14"/>Leaning on the ev-er-last-ing arms;</text:p>
      <text:p text:style-name="P9"><text:span text:style-name="T6"><text:s text:c="14"/>G <text:s text:c="20"/></text:span><text:span text:style-name="T8">C9</text:span></text:p>
      <text:p text:style-name="P10"><text:s text:c="14"/><text:span text:style-name="T12">What a bless-ed-ness, what a peace is mine,</text:span></text:p>
      <text:p text:style-name="P9"><text:span text:style-name="T7"><text:s text:c="14"/>G <text:s text:c="24"/>D <text:s text:c="2"/></text:span><text:span text:style-name="T13">G</text:span></text:p>
      <text:p text:style-name="P8"><text:s text:c="14"/>Leaning on the ev-er-last-ing arms.</text:p>
      <text:p text:style-name="P11"/>
      <text:p text:style-name="P12">[ <text:span text:style-name="T3">CHORUS</text:span> ] <text:s text:c="3"/><text:span text:style-name="T14">G</text:span><text:span text:style-name="T15"> <text:s text:c="19"/></text:span><text:span text:style-name="T16">C9</text:span></text:p>
      <text:p text:style-name="P13"><text:s text:c="14"/>Lean-ing, <text:s text:c="11"/>lean-ing, <text:s text:c="11"/></text:p>
      <text:p text:style-name="P14"><text:s text:c="14"/>[Lean-ing on Je-sus, lean-ing on Je-sus,]</text:p>
      <text:p text:style-name="P15"><text:s text:c="14"/><text:span text:style-name="T7">G <text:s text:c="26"/>D</text:span></text:p>
      <text:p text:style-name="P16"><text:s text:c="14"/><text:span text:style-name="T17">Safe and se-cure from all a-larms;</text:span></text:p>
      <text:p text:style-name="P17"><text:s text:c="14"/><text:span text:style-name="T6">G</text:span><text:span text:style-name="T7"> <text:s text:c="19"/>C9</text:span></text:p>
      <text:p text:style-name="P8"><text:s text:c="14"/>Lean-ing, <text:s text:c="11"/>lean-ing, <text:s text:c="11"/></text:p>
      <text:p text:style-name="P15"><text:s text:c="14"/>[Lean-ing on Je-sus, lean-ing on Je-sus,]</text:p>
      <text:p text:style-name="P12"><text:span text:style-name="T15"><text:s text:c="14"/>G <text:s text:c="24"/>D <text:s text:c="2"/></text:span><text:span text:style-name="T16">G</text:span></text:p>
      <text:p text:style-name="P13"><text:s text:c="14"/>Leaning on the ev-er-last-ing arms;</text:p>
      <text:p text:style-name="P14"/>
      <text:p text:style-name="P18">[ VERSE <text:span text:style-name="T18">2</text:span> ] <text:s text:c="2"/><text:span text:style-name="T14">G</text:span><text:span text:style-name="T15"> <text:s text:c="20"/></text:span><text:span text:style-name="T16">C9</text:span></text:p>
      <text:p text:style-name="P8"><text:s text:c="14"/><text:span text:style-name="T19">Oh, how sweet to walk in this pil-grim way,</text:span></text:p>
      <text:p text:style-name="P9"><text:span text:style-name="T7"><text:s text:c="14"/>G <text:s text:c="28"/>D</text:span></text:p>
      <text:p text:style-name="P8"><text:s text:c="14"/>Leaning on the ev-er-last-ing arms;</text:p>
      <text:p text:style-name="P9"><text:span text:style-name="T6"><text:s text:c="14"/>G <text:s text:c="22"/></text:span><text:span text:style-name="T8">C9</text:span></text:p>
      <text:p text:style-name="P10"><text:s text:c="14"/><text:span text:style-name="T20">Oh, how bright the path grows from day to day</text:span><text:span text:style-name="T12">,</text:span></text:p>
      <text:p text:style-name="P9"><text:span text:style-name="T7"><text:s text:c="14"/>G <text:s text:c="28"/>D</text:span></text:p>
      <text:p text:style-name="P8"><text:span text:style-name="T4"><text:s text:c="14"/></text:span><text:span text:style-name="T21">Leaning on the ev-er-last-ing arms.</text:span></text:p>
      <text:p text:style-name="P19"/>
      <text:p text:style-name="P20">[ CHORUS ]</text:p>
      <text:p text:style-name="P20"/>
      <text:p text:style-name="P18">[ VERSE <text:span text:style-name="T18">3</text:span> ] <text:s text:c="2"/><text:span text:style-name="T14">G</text:span><text:span text:style-name="T15"> <text:s text:c="20"/></text:span><text:span text:style-name="T16">C9</text:span></text:p>
      <text:p text:style-name="P8"><text:s text:c="14"/>What <text:span text:style-name="T22">have I to dread, what have I to fear</text:span>,</text:p>
      <text:p text:style-name="P9"><text:span text:style-name="T7"><text:s text:c="14"/>G <text:s text:c="28"/>D</text:span></text:p>
      <text:p text:style-name="P8"><text:s text:c="14"/>Leaning on the ev-er-last-ing arms;</text:p>
      <text:p text:style-name="P9"><text:span text:style-name="T6"><text:s text:c="14"/>G <text:s text:c="20"/></text:span><text:span text:style-name="T8">C9</text:span></text:p>
      <text:p text:style-name="P10"><text:s text:c="14"/><text:span text:style-name="T23">I have bless-ed peace with my Lord so near</text:span><text:span text:style-name="T12">,</text:span></text:p>
      <text:p text:style-name="P21"><text:span text:style-name="T7"><text:s text:c="14"/>G <text:s text:c="24"/>D <text:s text:c="2"/></text:span><text:span text:style-name="T13">G</text:span></text:p>
      <text:p text:style-name="P8"><text:s text:c="14"/><text:span text:style-name="T21">Leaning on the ev-er-last-ing arms.</text:span></text:p>
      <text:p text:style-name="P19"/>
      <text:p text:style-name="P20">[ <text:span text:style-name="T3">CHORUS</text:span> ]</text:p>
      <text:p text:style-name="P22"/>
      <text:p text:style-name="P23"><draw:frame draw:style-name="fr1" draw:name="Image1" text:anchor-type="char" svg:x="0.3811in" svg:y="0.0008in" svg:width="6.4484in" svg:height="9.939in" draw:z-index="0"><draw:image xlink:href="Pictures/10000000000009F600000CE441CBF38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date>2026-07-01T00:07:51.378680010</dc:date>
    <meta:editing-duration>PT3H44M45S</meta:editing-duration>
    <meta:editing-cycles>21</meta:editing-cycles>
    <meta:print-date>2026-07-01T00:06:08.798213022</meta:print-date>
    <meta:document-statistic meta:table-count="0" meta:image-count="1" meta:object-count="0" meta:page-count="2" meta:paragraph-count="43" meta:word-count="204" meta:character-count="1955" meta:non-whitespace-character-count="834"/>
  </office:meta>
</office:document-meta>
</file>