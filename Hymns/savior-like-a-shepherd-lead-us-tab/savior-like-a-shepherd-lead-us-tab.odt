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A521F67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Preformatted_20_Text">
      <style:text-properties fo:font-size="10.5pt" style:font-size-asian="10.5pt" style:font-size-complex="10.5pt"/>
    </style:style>
    <style:style style:name="P4" style:family="paragraph" style:parent-style-name="Preformatted_20_Text">
      <style:text-properties fo:font-size="12pt" officeooo:paragraph-rsid="001a7f6c" style:font-size-asian="12pt" style:font-size-complex="12pt"/>
    </style:style>
    <style:style style:name="P5" style:family="paragraph" style:parent-style-name="Preformatted_20_Text">
      <style:text-properties fo:color="#2a6099" loext:opacity="100%" fo:font-size="12pt" fo:font-weight="bold" officeooo:paragraph-rsid="0025def4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style:font-size-asian="12pt" style:font-size-complex="12pt"/>
    </style:style>
    <style:style style:name="P8" style:family="paragraph" style:parent-style-name="Preformatted_20_Text">
      <style:text-properties fo:font-size="12pt" fo:font-weight="bold" officeooo:paragraph-rsid="001f6b67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officeooo:paragraph-rsid="001f6b67" style:font-size-asian="12pt" style:font-size-complex="12pt"/>
    </style:style>
    <style:style style:name="P10" style:family="paragraph" style:parent-style-name="Preformatted_20_Text">
      <style:text-properties fo:font-size="12pt" officeooo:rsid="0025def4" officeooo:paragraph-rsid="0025def4" style:font-size-asian="12pt" style:font-size-complex="12pt"/>
    </style:style>
    <style:style style:name="P11" style:family="paragraph" style:parent-style-name="Preformatted_20_Text">
      <style:text-properties fo:font-size="12pt" officeooo:paragraph-rsid="0025def4" style:font-size-asian="12pt" style:font-size-complex="12pt"/>
    </style:style>
    <style:style style:name="P12" style:family="paragraph" style:parent-style-name="Preformatted_20_Text">
      <style:text-properties style:use-window-font-color="true" loext:opacity="0%" fo:font-size="12pt" fo:font-weight="normal" officeooo:rsid="0025def4" officeooo:paragraph-rsid="0025def4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fo:color="#2a6099" loext:opacity="100%" fo:font-size="12pt" fo:font-weight="bold" officeooo:rsid="0025def4" officeooo:paragraph-rsid="0025def4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fo:font-size="12pt" fo:font-weight="bold" officeooo:paragraph-rsid="0025def4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fo:font-size="12pt" officeooo:rsid="00265802" officeooo:paragraph-rsid="00265802" style:font-size-asian="12pt" style:font-size-complex="12pt"/>
    </style:style>
    <style:style style:name="P16" style:family="paragraph" style:parent-style-name="Preformatted_20_Text">
      <style:text-properties fo:color="#2a6099" loext:opacity="100%" fo:font-size="12pt" fo:font-weight="bold" officeooo:rsid="0025def4" officeooo:paragraph-rsid="00265802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use-window-font-color="true" loext:opacity="0%" fo:font-size="12pt" fo:font-weight="normal" officeooo:rsid="0025def4" officeooo:paragraph-rsid="00265802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break-before="page"/>
      <style:text-properties officeooo:paragraph-rsid="0025def4"/>
    </style:style>
    <style:style style:name="T1" style:family="text">
      <style:text-properties style:text-underline-style="solid" style:text-underline-width="auto" style:text-underline-color="font-color" officeooo:rsid="0023e7a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c8f4"/>
    </style:style>
    <style:style style:name="T4" style:family="text">
      <style:text-properties officeooo:rsid="0023e7a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037b" style:font-weight-asian="bold" style:font-weight-complex="bold"/>
    </style:style>
    <style:style style:name="T7" style:family="text">
      <style:text-properties fo:color="#2a6099" loext:opacity="100%" fo:font-weight="bold" officeooo:rsid="0025def4" style:font-weight-asian="bold" style:font-weight-complex="bold"/>
    </style:style>
    <style:style style:name="T8" style:family="text">
      <style:text-properties fo:color="#2a6099" loext:opacity="100%" fo:font-weight="bold" style:font-weight-asian="bold" style:font-weight-complex="bold"/>
    </style:style>
    <style:style style:name="T9" style:family="text">
      <style:text-properties fo:color="#2a6099" loext:opacity="100%" fo:font-weight="bold" officeooo:rsid="00285f84" style:font-weight-asian="bold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fo:font-weight="bold" officeooo:rsid="0025def4" style:font-weight-asian="bold" style:font-weight-complex="bold"/>
    </style:style>
    <style:style style:name="T12" style:family="text">
      <style:text-properties officeooo:rsid="0025def4"/>
    </style:style>
    <style:style style:name="T13" style:family="text">
      <style:text-properties officeooo:rsid="00285f84"/>
    </style:style>
    <style:style style:name="T14" style:family="text">
      <style:text-properties fo:color="#2a6099" loext:opacity="100%" fo:font-weight="bold" officeooo:rsid="001dbbdb" style:font-weight-asian="bold" style:font-weight-complex="bold"/>
    </style:style>
    <style:style style:name="T15" style:family="text">
      <style:text-properties officeooo:rsid="00265802"/>
    </style:style>
    <style:style style:name="T16" style:family="text">
      <style:text-properties officeooo:rsid="001dbb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374in, 5.4063in, 9.1346in, 5.14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avior, Like A Shepherd Lead Us</text:span><text:span text:style-name="T2"> (Blue Hymnal #</text:span><text:span text:style-name="T1">161</text:span><text:span text:style-name="T2">)</text:span></text:p>
      <text:p text:style-name="P2">Words: <text:span text:style-name="T3">D</text:span><text:span text:style-name="T4">orothy A. Thrupp</text:span> <text:s text:c="2"/>Music: <text:span text:style-name="T4">William B. Bradbury</text:span></text:p>
      <text:p text:style-name="P3"/>
      <text:p text:style-name="P4"><text:span text:style-name="T5">[ C</text:span><text:span text:style-name="T6">HORDS</text:span><text:span text:style-name="T5"> <text:s/>] <text:s text:c="6"/></text:span><text:span text:style-name="T7">G</text:span><text:span text:style-name="T8"> <text:s text:c="6"/>A</text:span><text:span text:style-name="T7">m</text:span><text:span text:style-name="T9">7</text:span><text:span text:style-name="T8"> <text:s text:c="4"/></text:span><text:span text:style-name="T7">C9</text:span><text:span text:style-name="T8"> <text:s text:c="10"/></text:span><text:span text:style-name="T10">[ CAPO </text:span><text:span text:style-name="T11">5</text:span><text:span text:style-name="T10"> ]</text:span></text:p>
      <text:p text:style-name="P5"><text:s text:c="18"/><text:span text:style-name="T12">==</text:span>oo=<text:span text:style-name="T12">=</text:span> <text:s/><text:span text:style-name="T12">oo</text:span>=<text:span text:style-name="T13">o</text:span>=<text:span text:style-name="T12">o</text:span> <text:s/>o<text:span text:style-name="T12">==</text:span>o==</text:p>
      <text:p text:style-name="P6"><text:s text:c="18"/>|||||| <text:s/>||||<text:span text:style-name="T12">O</text:span>| <text:s/>||||||</text:p>
      <text:p text:style-name="P5"><text:s text:c="18"/>|O|||| <text:s/>||O<text:span text:style-name="T13">|</text:span><text:span text:style-name="T12">|</text:span>| <text:s/>||<text:span text:style-name="T12">O|</text:span>|<text:span text:style-name="T12">|</text:span></text:p>
      <text:p text:style-name="P5"><text:s text:c="18"/>O|||OO <text:s/>|||||| <text:s/>|<text:span text:style-name="T12">O</text:span>||O<text:span text:style-name="T12">O</text:span></text:p>
      <text:p text:style-name="P7"/>
      <text:p text:style-name="P8">[ VERSE 1 ]</text:p>
      <text:p text:style-name="P9"><text:span text:style-name="T7">G</text:span><text:span text:style-name="T8"> <text:s text:c="33"/></text:span><text:span text:style-name="T14">A</text:span><text:span text:style-name="T7">m7 <text:s text:c="21"/>G</text:span></text:p>
      <text:p text:style-name="P10">Sav-ior, like a shep-herd lead us, <text:span text:style-name="T15">M</text:span>uch we need Thy ten-der care;</text:p>
      <text:p text:style-name="P11"><text:span text:style-name="T7">G</text:span><text:span text:style-name="T14"> <text:s text:c="34"/>A</text:span><text:span text:style-name="T7">m7 <text:s text:c="22"/>G</text:span></text:p>
      <text:p text:style-name="P10">In Thy plea-sant pas-tures feed us, <text:span text:style-name="T15">F</text:span>or our use Thy folds pre-pare:</text:p>
      <text:p text:style-name="P11"><text:span text:style-name="T7"><text:s text:c="9"/>C9</text:span><text:span text:style-name="T14"> <text:s text:c="14"/></text:span><text:span text:style-name="T7">G</text:span><text:span text:style-name="T14"> <text:s text:c="16"/>A</text:span><text:span text:style-name="T7">m7 <text:s text:c="16"/>G</text:span></text:p>
      <text:p text:style-name="P12">Bles-sed Je-sus, Bles-sed Je-sus, Thou hast bought us, <text:span text:style-name="T15">T</text:span>hine we are;</text:p>
      <text:p text:style-name="P13"><text:span text:style-name="T8"><text:s text:c="9"/></text:span>C9<text:span text:style-name="T14"> <text:s text:c="14"/></text:span>G<text:span text:style-name="T14"> <text:s text:c="16"/></text:span><text:span text:style-name="T8"><text:s text:c="11"/></text:span>C9<text:span text:style-name="T8"> <text:s text:c="6"/>G</text:span></text:p>
      <text:p text:style-name="P12">Bles-sed Je-sus, Bles-sed Je-sus, Thou hast bought us, <text:span text:style-name="T15">T</text:span>hine we are.</text:p>
      <text:p text:style-name="P9"/>
      <text:p text:style-name="P14">[ VERSE <text:span text:style-name="T12">2</text:span> ]</text:p>
      <text:p text:style-name="P11"><text:span text:style-name="T7">G</text:span><text:span text:style-name="T8"> <text:s text:c="35"/></text:span><text:span text:style-name="T14">A</text:span><text:span text:style-name="T7">m7 <text:s text:c="20"/>G</text:span></text:p>
      <text:p text:style-name="P15">We are Thine; do Thou be-friend us, <text:s/>Be the guard-ian of our way;</text:p>
      <text:p text:style-name="P11"><text:span text:style-name="T7">G</text:span><text:span text:style-name="T14"> <text:s text:c="34"/>A</text:span><text:span text:style-name="T7">m7 <text:s text:c="17"/>G</text:span></text:p>
      <text:p text:style-name="P10"><text:span text:style-name="T15">Keep Thy flock from sin de-fend us, Seek us when we go a-stray</text:span>:</text:p>
      <text:p text:style-name="P11"><text:span text:style-name="T7"><text:s text:c="9"/>C9</text:span><text:span text:style-name="T14"> <text:s text:c="14"/></text:span><text:span text:style-name="T7">G</text:span><text:span text:style-name="T14"> <text:s text:c="14"/>A</text:span><text:span text:style-name="T7">m7 <text:s text:c="12"/>G</text:span></text:p>
      <text:p text:style-name="P12">Bles-sed Je-sus, Bles-sed Je-sus, <text:span text:style-name="T15">Hear, O hear us when we pray;</text:span></text:p>
      <text:p text:style-name="P16"><text:s text:c="9"/>C9<text:span text:style-name="T16"> <text:s text:c="14"/></text:span>G<text:span text:style-name="T16"> <text:s text:c="16"/></text:span><text:s text:c="6"/>C9 <text:s text:c="5"/>G</text:p>
      <text:p text:style-name="P17">Bles-sed Je-sus, Bles-sed Je-sus, <text:span text:style-name="T15">Hear, O hear us when we pray;</text:span></text:p>
      <text:p text:style-name="P12"/>
      <text:p text:style-name="P14">[ VERSE <text:span text:style-name="T12">3</text:span> ]</text:p>
      <text:p text:style-name="P11"><text:span text:style-name="T7">G</text:span><text:span text:style-name="T8"> <text:s text:c="34"/></text:span><text:span text:style-name="T14">A</text:span><text:span text:style-name="T7">m7 <text:s text:c="23"/>G</text:span></text:p>
      <text:p text:style-name="P10"><text:span text:style-name="T15">Thou hast prom-ised to re-ceive</text:span> us, <text:span text:style-name="T15">Poor and sin-ful though we be</text:span>;</text:p>
      <text:p text:style-name="P11"><text:span text:style-name="T7">G</text:span><text:span text:style-name="T14"> <text:s text:c="31"/>A</text:span><text:span text:style-name="T7">m7 <text:s text:c="26"/>G</text:span></text:p>
      <text:p text:style-name="P10"><text:span text:style-name="T15">Thou hast mer-cy to re-lieve us, Grace to cleanse and power to free</text:span>:</text:p>
      <text:p text:style-name="P11"><text:span text:style-name="T7"><text:s text:c="9"/>C9</text:span><text:span text:style-name="T14"> <text:s text:c="14"/></text:span><text:span text:style-name="T7">G</text:span><text:span text:style-name="T14"> <text:s text:c="13"/>A</text:span><text:span text:style-name="T7">m7 <text:s text:c="11"/>G</text:span></text:p>
      <text:p text:style-name="P12">Bles-sed Je-sus, Bles-sed Je-sus, <text:span text:style-name="T15">Ear-ly let us turn to Thee</text:span>;</text:p>
      <text:p text:style-name="P16"><text:s text:c="9"/>C9<text:span text:style-name="T16"> <text:s text:c="14"/></text:span>G<text:span text:style-name="T16"> <text:s text:c="16"/></text:span><text:s text:c="4"/>C9 <text:s text:c="5"/>G</text:p>
      <text:p text:style-name="P17">Bles-sed Je-sus, Bles-sed Je-sus, <text:span text:style-name="T15">Ear-ly let us turn to Thee</text:span>;</text:p>
      <text:p text:style-name="P14"/>
      <text:p text:style-name="P14">[ VERSE <text:span text:style-name="T12">4</text:span> ]</text:p>
      <text:p text:style-name="P11"><text:span text:style-name="T7">G</text:span><text:span text:style-name="T8"> <text:s text:c="30"/></text:span><text:span text:style-name="T14">A</text:span><text:span text:style-name="T7">m7 <text:s text:c="17"/>G</text:span></text:p>
      <text:p text:style-name="P15">Ear-ly, let us seek Thy fa-vor, Ear-ly let us do Thy will;</text:p>
      <text:p text:style-name="P11"><text:span text:style-name="T7">G</text:span><text:span text:style-name="T14"> <text:s text:c="31"/>A</text:span><text:span text:style-name="T7">m7 <text:s text:c="22"/>G</text:span></text:p>
      <text:p text:style-name="P10"><text:span text:style-name="T15">Bless-ed Lord and on-ly Sav-ior, With Thy love our be-ings fill</text:span>:</text:p>
      <text:p text:style-name="P11"><text:span text:style-name="T7"><text:s text:c="9"/>C9</text:span><text:span text:style-name="T14"> <text:s text:c="14"/></text:span><text:span text:style-name="T7">G</text:span><text:span text:style-name="T14"> <text:s text:c="16"/>A</text:span><text:span text:style-name="T7">m7 <text:s text:c="14"/>G</text:span></text:p>
      <text:p text:style-name="P12">Bles-sed Je-sus, Bles-sed Je-sus, Thou hast <text:span text:style-name="T15">loved</text:span> us, <text:span text:style-name="T15">love us still</text:span>.</text:p>
      <text:p text:style-name="P13"><text:s text:c="9"/>C9<text:span text:style-name="T16"> <text:s text:c="14"/></text:span>G<text:span text:style-name="T16"> <text:s text:c="16"/></text:span><text:s text:c="10"/>C9 <text:s text:c="5"/>G</text:p>
      <text:p text:style-name="P17">Bles-sed Je-sus, Bles-sed Je-sus, Thou hast <text:span text:style-name="T15">loved</text:span> us, <text:span text:style-name="T15">love us still</text:span>.</text:p>
      <text:p text:style-name="P18"><draw:frame draw:style-name="fr1" draw:name="Image1" text:anchor-type="char" svg:x="0.3882in" svg:y="0.0118in" svg:width="6.5945in" svg:height="9.9681in" draw:z-index="0"><draw:image xlink:href="Pictures/10000000000009F600000CE4A521F67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6-24T00:09:35.450711363</dc:date>
    <meta:editing-duration>PT3H30M14S</meta:editing-duration>
    <meta:editing-cycles>15</meta:editing-cycles>
    <meta:print-date>2026-06-01T23:37:23.048033305</meta:print-date>
    <meta:printed-by>PDF files</meta:printed-by>
    <meta:document-statistic meta:table-count="0" meta:image-count="1" meta:object-count="0" meta:page-count="2" meta:paragraph-count="43" meta:word-count="295" meta:character-count="2374" meta:non-whitespace-character-count="1170"/>
  </office:meta>
</office:document-meta>
</file>