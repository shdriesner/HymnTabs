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9F71D96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Preformatted_20_Text">
      <style:text-properties fo:font-size="8pt" style:font-size-asian="8pt" style:font-size-complex="8pt"/>
    </style:style>
    <style:style style:name="P4" style:family="paragraph" style:parent-style-name="Preformatted_20_Text">
      <style:text-properties fo:font-size="12pt" officeooo:paragraph-rsid="0015b60d" style:font-size-asian="12pt" style:font-size-complex="12pt"/>
    </style:style>
    <style:style style:name="P5" style:family="paragraph" style:parent-style-name="Preformatted_20_Text">
      <style:text-properties fo:color="#2a6099" loext:opacity="100%" fo:font-size="12pt" fo:font-weight="bold" officeooo:paragraph-rsid="0016ac70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style:font-size-asian="12pt" style:font-size-complex="12pt"/>
    </style:style>
    <style:style style:name="P7" style:family="paragraph" style:parent-style-name="Preformatted_20_Text">
      <style:text-properties fo:font-size="12pt" officeooo:rsid="00184933" officeooo:paragraph-rsid="00184933" style:font-size-asian="12pt" style:font-size-complex="12pt"/>
    </style:style>
    <style:style style:name="P8" style:family="paragraph" style:parent-style-name="Preformatted_20_Text">
      <style:text-properties fo:font-size="12pt" officeooo:paragraph-rsid="00184933" style:font-size-asian="12pt" style:font-size-complex="12pt"/>
    </style:style>
    <style:style style:name="P9" style:family="paragraph" style:parent-style-name="Preformatted_20_Text">
      <style:text-properties fo:font-size="12pt" fo:font-weight="bold" officeooo:paragraph-rsid="00184933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fo:font-size="12pt" fo:font-weight="bold" officeooo:rsid="00184933" officeooo:paragraph-rsid="00184933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fo:font-size="14pt" style:font-size-asian="14pt" style:font-size-complex="14pt"/>
    </style:style>
    <style:style style:name="P12" style:family="paragraph" style:parent-style-name="Preformatted_20_Text">
      <style:paragraph-properties fo:break-before="page"/>
    </style:style>
    <style:style style:name="T1" style:family="text">
      <style:text-properties officeooo:rsid="0016ac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713c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2a6099" loext:opacity="100%" fo:font-weight="bold" officeooo:rsid="0016ac70" style:font-weight-asian="bold" style:font-weight-complex="bold"/>
    </style:style>
    <style:style style:name="T6" style:family="text">
      <style:text-properties style:use-window-font-color="true" loext:opacity="0%" fo:font-weight="bold" style:font-weight-asian="bold" style:font-weight-complex="bold"/>
    </style:style>
    <style:style style:name="T7" style:family="text">
      <style:text-properties style:use-window-font-color="true" loext:opacity="0%" fo:font-weight="bold" officeooo:rsid="001329a1" style:font-weight-asian="bold" style:font-weight-complex="bold"/>
    </style:style>
    <style:style style:name="T8" style:family="text">
      <style:text-properties fo:color="#2a6099" loext:opacity="100%" fo:font-weight="bold" officeooo:rsid="00184933" style:font-weight-asian="bold" style:font-weight-complex="bold"/>
    </style:style>
    <style:style style:name="T9" style:family="text">
      <style:text-properties officeooo:rsid="00184933"/>
    </style:style>
    <style:style style:name="T10" style:family="text">
      <style:text-properties fo:font-weight="bold" officeooo:rsid="00184933" style:font-weight-asian="bold" style:font-weight-complex="bold"/>
    </style:style>
    <style:style style:name="T11" style:family="text">
      <style:text-properties officeooo:rsid="000e0c89"/>
    </style:style>
    <style:style style:name="T12" style:family="text">
      <style:text-properties fo:color="#2a6099" loext:opacity="100%"/>
    </style:style>
    <style:style style:name="T13" style:family="text">
      <style:text-properties fo:color="#2a6099" loext:opacity="100%" officeooo:rsid="001849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472in, 7.0291in, 8.3965in, 3.374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urn Your Eyes Upon Jesus</text:span> (Blue Hymnal #<text:span text:style-name="T1">413</text:span>)</text:p>
      <text:p text:style-name="P2">Words <text:span text:style-name="T1">&amp; Music</text:span>: <text:span text:style-name="T1">Helen H. Lemmel</text:span></text:p>
      <text:p text:style-name="P3"/>
      <text:p text:style-name="P4"><text:span text:style-name="T2">[ C</text:span><text:span text:style-name="T3">HORDS</text:span><text:span text:style-name="T2"> ] <text:s/></text:span><text:span text:style-name="T4">D <text:s text:c="5"/></text:span><text:span text:style-name="T5">Em <text:s text:c="4"/></text:span><text:span text:style-name="T4">A <text:s text:c="5"/>G <text:s text:c="5"/></text:span><text:span text:style-name="T5">F#</text:span><text:span text:style-name="T4">m <text:s text:c="3"/></text:span><text:span text:style-name="T6">[ CAPO </text:span><text:span text:style-name="T7">3</text:span><text:span text:style-name="T6"> ]</text:span></text:p>
      <text:p text:style-name="P5"><text:s text:c="12"/>xoo=== o==o<text:span text:style-name="T1">oo</text:span> oo===o ==oo== ======</text:p>
      <text:p text:style-name="P5"><text:s text:c="12"/>|||||| |||||| |||||| |||||| ||||||</text:p>
      <text:p text:style-name="P5"><text:s text:c="12"/>|||O|O |<text:span text:style-name="T1">OO</text:span>||| ||OOO| |O|||| OO|<text:span text:style-name="T1">OO</text:span>O</text:p>
      <text:p text:style-name="P5"><text:s text:c="12"/>||||O| |||||| |||||| O|||OO ||||<text:span text:style-name="T1">|</text:span>|</text:p>
      <text:p text:style-name="P5"><text:s text:c="12"/>|||||| |||||| |||||| |||||| |OO||<text:span text:style-name="T1">|</text:span></text:p>
      <text:p text:style-name="P6"/>
      <text:p text:style-name="P6"><text:span text:style-name="T2">[ INTRO ] <text:s text:c="2"/></text:span><text:span text:style-name="T4">| D <text:s/>| </text:span><text:span text:style-name="T5">G</text:span><text:span text:style-name="T4"> <text:s/>| D A <text:s/>| D <text:s/>|</text:span></text:p>
      <text:p text:style-name="P6"/>
      <text:p text:style-name="P6"><text:span text:style-name="T2">[ VERSE 1 ]</text:span> <text:s text:c="2"/><text:span text:style-name="T4">D <text:s text:c="23"/></text:span><text:span text:style-name="T8">Em <text:s text:c="2"/>A</text:span></text:p>
      <text:p text:style-name="P7"><text:s text:c="12"/>O soul, are you wea-ry and trou-bled?</text:p>
      <text:p text:style-name="P6"><text:s text:c="6"/><text:span text:style-name="T4"><text:s text:c="9"/></text:span><text:span text:style-name="T8">G <text:s text:c="11"/>A <text:s text:c="12"/>D</text:span></text:p>
      <text:p text:style-name="P7"><text:s text:c="12"/>No light in the dark-ness you see?</text:p>
      <text:p text:style-name="P6"><text:s text:c="20"/><text:span text:style-name="T4">D <text:s text:c="22"/></text:span><text:span text:style-name="T8">F#m A</text:span></text:p>
      <text:p text:style-name="P7"><text:s text:c="12"/>There’s light for a look at the Sav-ior,</text:p>
      <text:p text:style-name="P7"><text:s text:c="16"/><text:span text:style-name="T4">D <text:s text:c="10"/>Em <text:s text:c="6"/>G <text:s text:c="2"/>A</text:span></text:p>
      <text:p text:style-name="P8"><text:span text:style-name="T9"><text:s text:c="12"/>And life more a-bun-dant and free!</text:span></text:p>
      <text:p text:style-name="P6"/>
      <text:p text:style-name="P8"><text:span text:style-name="T2">[ </text:span><text:span text:style-name="T10">CHORUS</text:span><text:span text:style-name="T2"> ] <text:s/></text:span><text:span text:style-name="T4">D <text:s text:c="19"/></text:span><text:span text:style-name="T8">G</text:span></text:p>
      <text:p text:style-name="P7"><text:s text:c="12"/>Turn your eyes up-on Je-sus,</text:p>
      <text:p text:style-name="P7"><text:s text:c="17"/><text:span text:style-name="T4">Em <text:s text:c="21"/>A</text:span></text:p>
      <text:p text:style-name="P7"><text:s text:c="12"/>Look full in His won-der-ful face.</text:p>
      <text:p text:style-name="P7"><text:s text:c="20"/><text:span text:style-name="T4">D <text:s text:c="24"/></text:span><text:span text:style-name="T4">G</text:span></text:p>
      <text:p text:style-name="P7"><text:s text:c="12"/>And the things of earth will grow strange-ly dim</text:p>
      <text:p text:style-name="P7"><text:s text:c="19"/><text:span text:style-name="T4">D <text:s text:c="11"/>A <text:s text:c="9"/>D</text:span></text:p>
      <text:p text:style-name="P7"><text:s text:c="12"/>In the light of His glo-ry and grace.</text:p>
      <text:p text:style-name="P7"/>
      <text:p text:style-name="P9">[ <text:span text:style-name="T11">VERSE</text:span> 2 ]<text:span text:style-name="T12"> <text:s text:c="8"/>D <text:s text:c="21"/></text:span><text:span text:style-name="T13">Em <text:s text:c="2"/>A</text:span></text:p>
      <text:p text:style-name="P6"><text:s text:c="12"/><text:span text:style-name="T9">Through death in-to life ev-er-last-ing</text:span></text:p>
      <text:p text:style-name="P8"><text:s text:c="15"/><text:span text:style-name="T8">G <text:s text:c="13"/>A <text:s text:c="10"/>D</text:span></text:p>
      <text:p text:style-name="P6"><text:s text:c="12"/><text:span text:style-name="T9">He passed, and we fol-low Him there;</text:span></text:p>
      <text:p text:style-name="P8"><text:s text:c="18"/><text:span text:style-name="T4">D <text:s text:c="21"/></text:span><text:span text:style-name="T8">F#m A</text:span></text:p>
      <text:p text:style-name="P6"><text:s text:c="12"/><text:span text:style-name="T9">O-ver us sin no more hath do-min-ion--</text:span></text:p>
      <text:p text:style-name="P8"><text:s text:c="16"/><text:span text:style-name="T8">D <text:s text:c="8"/>Em <text:s text:c="8"/>G <text:s/>A</text:span></text:p>
      <text:p text:style-name="P6"><text:s text:c="12"/><text:span text:style-name="T9">For more than con-q’rors we are!</text:span></text:p>
      <text:p text:style-name="P6"/>
      <text:p text:style-name="P10">[ CHORUS ]</text:p>
      <text:p text:style-name="P6"><text:s/></text:p>
      <text:p text:style-name="P9">[ V<text:span text:style-name="T11">ERSE</text:span> 3 ]<text:span text:style-name="T12"> <text:s text:c="4"/>D <text:s text:c="27"/></text:span><text:span text:style-name="T13">Em <text:s text:c="2"/>A</text:span></text:p>
      <text:p text:style-name="P6"><text:s text:c="12"/><text:span text:style-name="T9">His word shall not fail you – he prom-ised;</text:span></text:p>
      <text:p text:style-name="P8"><text:s text:c="15"/><text:span text:style-name="T8">G <text:s text:c="13"/>A <text:s text:c="10"/>D</text:span></text:p>
      <text:p text:style-name="P6"><text:s text:c="12"/><text:span text:style-name="T9">Be-lieve Him, and all will be well.</text:span></text:p>
      <text:p text:style-name="P8"><text:s text:c="17"/><text:span text:style-name="T4">D <text:s text:c="20"/></text:span><text:span text:style-name="T8">F#m A</text:span></text:p>
      <text:p text:style-name="P6"><text:s text:c="12"/><text:span text:style-name="T9">Then go to a world that is dy- ing,</text:span></text:p>
      <text:p text:style-name="P8"><text:s text:c="16"/><text:span text:style-name="T8">D <text:s text:c="11"/>Em <text:s text:c="5"/>G <text:s/>A</text:span></text:p>
      <text:p text:style-name="P6"><text:s text:c="12"/><text:span text:style-name="T9">His per-fect sal-va-tion to tell!</text:span></text:p>
      <text:p text:style-name="P11"/>
      <text:p text:style-name="P10">[ CHORUS ]</text:p>
      <text:p text:style-name="P12"><draw:frame draw:style-name="fr1" draw:name="Image1" text:anchor-type="char" svg:x="0.4193in" svg:y="-0.0256in" svg:width="6.528in" svg:height="10.0709in" draw:z-index="0"><draw:image xlink:href="Pictures/10000000000009F600000CE49F71D96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6-05-12T20:58:38.943627220</dc:date>
    <meta:editing-duration>PT2H52M51S</meta:editing-duration>
    <meta:editing-cycles>12</meta:editing-cycles>
    <meta:print-date>2024-11-07T18:40:41.441612534</meta:print-date>
    <meta:document-statistic meta:table-count="0" meta:image-count="1" meta:object-count="0" meta:page-count="2" meta:paragraph-count="44" meta:word-count="243" meta:character-count="1896" meta:non-whitespace-character-count="849"/>
  </office:meta>
</office:document-meta>
</file>