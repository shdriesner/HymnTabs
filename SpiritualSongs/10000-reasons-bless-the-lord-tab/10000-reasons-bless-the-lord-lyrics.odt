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style:text-underline-style="none" fo:font-weight="bold" officeooo:paragraph-rsid="001a1fe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pt" style:text-underline-style="none" fo:font-weight="normal" officeooo:rsid="002be0f6" officeooo:paragraph-rsid="001a1fe9" style:font-size-asian="7pt" style:font-weight-asian="normal" style:font-size-complex="8pt" style:font-weight-complex="normal"/>
    </style:style>
    <style:style style:name="P3" style:family="paragraph" style:parent-style-name="Standard">
      <style:text-properties style:font-name="DejaVu Sans Mono" fo:font-size="16pt" fo:font-weight="bold" officeooo:rsid="002a3e95" officeooo:paragraph-rsid="001a1fe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style:text-underline-style="none" fo:font-weight="bold" officeooo:rsid="002a3e95" officeooo:paragraph-rsid="001a1f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2a3e95" officeooo:paragraph-rsid="001a1fe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6pt" fo:font-weight="normal" officeooo:rsid="002a3e95" officeooo:paragraph-rsid="001a1fe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177da" officeooo:paragraph-rsid="001a1f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6pt" style:text-underline-style="none" officeooo:rsid="001177da" officeooo:paragraph-rsid="001a1fe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a1fe9" officeooo:paragraph-rsid="001a1fe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16pt" officeooo:rsid="002a3e95" officeooo:paragraph-rsid="001a1fe9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6pt" officeooo:paragraph-rsid="001a1fe9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6pt" style:text-underline-style="none" officeooo:paragraph-rsid="001a1fe9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e9f39" officeooo:paragraph-rsid="001a1fe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16pt" officeooo:rsid="002b6c48" officeooo:paragraph-rsid="001a1fe9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2a6099" loext:opacity="100%" style:font-name="DejaVu Sans Mono" fo:font-size="16pt" fo:font-weight="bold" officeooo:rsid="001e9f39" officeooo:paragraph-rsid="001a1fe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6pt" fo:font-weight="normal" officeooo:rsid="002a3e95" officeooo:paragraph-rsid="001a1fe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 Mono" fo:font-size="16pt" style:text-underline-style="none" fo:font-weight="bold" officeooo:rsid="001e9f39" officeooo:paragraph-rsid="001a1fe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officeooo:rsid="001e9f39" officeooo:paragraph-rsid="001a1fe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6pt" fo:font-weight="normal" officeooo:rsid="002b6c48" officeooo:paragraph-rsid="001a1fe9" style:font-size-asian="16pt" style:font-weight-asian="normal" style:font-size-complex="16pt" style:font-weight-complex="normal"/>
    </style:style>
    <style:style style:name="T1" style:family="text">
      <style:text-properties officeooo:rsid="002a3e95"/>
    </style:style>
    <style:style style:name="T2" style:family="text">
      <style:text-properties officeooo:rsid="001b7e80"/>
    </style:style>
    <style:style style:name="T3" style:family="text">
      <style:text-properties officeooo:rsid="0022a077"/>
    </style:style>
    <style:style style:name="T4" style:family="text">
      <style:text-properties officeooo:rsid="002be0f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f14f" style:font-weight-asian="bold" style:font-weight-complex="bold"/>
    </style:style>
    <style:style style:name="T7" style:family="text">
      <style:text-properties fo:font-weight="bold" officeooo:rsid="001a1fe9" style:font-weight-asian="bold" style:font-weight-complex="bold"/>
    </style:style>
    <style:style style:name="T8" style:family="text">
      <style:text-properties officeooo:rsid="001177da"/>
    </style:style>
    <style:style style:name="T9" style:family="text">
      <style:text-properties style:text-underline-style="none" fo:font-weight="bold" officeooo:rsid="001e9f39" style:font-weight-asian="bold" style:font-weight-complex="bold"/>
    </style:style>
    <style:style style:name="T10" style:family="text">
      <style:text-properties fo:font-weight="bold" officeooo:rsid="001177da" style:font-weight-asian="bold" style:font-weight-complex="bold"/>
    </style:style>
    <style:style style:name="T11" style:family="text">
      <style:text-properties fo:font-weight="bold" officeooo:rsid="001e9f39" style:font-weight-asian="bold" style:font-weight-complex="bold"/>
    </style:style>
    <style:style style:name="T12" style:family="text">
      <style:text-properties officeooo:rsid="001ba660"/>
    </style:style>
    <style:style style:name="T13" style:family="text">
      <style:text-properties style:use-window-font-color="true" loext:opacity="0%" fo:font-weight="normal" officeooo:rsid="001a1fe9" style:font-weight-asian="normal" style:font-weight-complex="normal"/>
    </style:style>
    <style:style style:name="T14" style:family="text">
      <style:text-properties style:use-window-font-color="true" loext:opacity="0%" fo:font-weight="normal" officeooo:rsid="002b6c48" style:font-weight-asian="normal" style:font-weight-complex="normal"/>
    </style:style>
    <style:style style:name="T15" style:family="text">
      <style:text-properties officeooo:rsid="001a1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,000 Reasons</text:span><text:span text:style-name="T2"> (</text:span><text:span text:style-name="T1">Bless the Lord</text:span><text:span text:style-name="T2">)</text:span></text:p>
      <text:p text:style-name="P1">(<text:span text:style-name="T2">Sing! Hymnal </text:span><text:span text:style-name="T3">#</text:span><text:span text:style-name="T1">38</text:span>)</text:p>
      <text:p text:style-name="P2">Words and Music: Jonas Myrin, Matt Redman</text:p>
      <text:p text:style-name="P3"/>
      <text:p text:style-name="P4">CHORUS</text:p>
      <text:p text:style-name="P5"/>
      <text:p text:style-name="P6">Bless the Lord, O my soul, O my soul,</text:p>
      <text:p text:style-name="P6"><text:span text:style-name="T4">W</text:span>or-ship His ho-ly name;</text:p>
      <text:p text:style-name="P6">Sing like ne-ver be-fore, O my soul</text:p>
      <text:p text:style-name="P6">I’ll wor-ship Your ho-ly name.</text:p>
      <text:p text:style-name="P7"/>
      <text:p text:style-name="P8"><text:span text:style-name="T5">VERSE</text:span><text:span text:style-name="T6"> </text:span><text:span text:style-name="T7">1</text:span></text:p>
      <text:p text:style-name="P9"/>
      <text:p text:style-name="P10">The sun comes up, it’s a new day dawn-ing</text:p>
      <text:p text:style-name="P10">It’s time to sing your song a-gain</text:p>
      <text:p text:style-name="P10">What-e-ver may pass or what-e-ver lies be-fore me</text:p>
      <text:p text:style-name="P10">Let me be sing-ing when the eve-ning comes.</text:p>
      <text:p text:style-name="P11"><text:span text:style-name="T8"><text:line-break/></text:span><text:span text:style-name="T9">CHORUS</text:span></text:p>
      <text:p text:style-name="P12"/>
      <text:p text:style-name="P12"><text:span text:style-name="T10">VERSE </text:span><text:span text:style-name="T11">2</text:span></text:p>
      <text:p text:style-name="P13"/>
      <text:p text:style-name="P14">You’r<text:span text:style-name="T12">e</text:span> rich in love and you’re slow to an-ger;</text:p>
      <text:p text:style-name="P14">Your name is great, and your heart is kind.</text:p>
      <text:p text:style-name="P14">For all Your good-ness I will keep on sing-ing</text:p>
      <text:p text:style-name="P15"><text:span text:style-name="T13">T</text:span><text:span text:style-name="T14">en thou-sand rea-sons for my heart to find.</text:span></text:p>
      <text:p text:style-name="P16"/>
      <text:p text:style-name="P17">CHORUS</text:p>
      <text:p text:style-name="P11"/>
      <text:p text:style-name="P8"><text:span text:style-name="T5">VERSE </text:span><text:span text:style-name="T11">2</text:span></text:p>
      <text:p text:style-name="P18"/>
      <text:p text:style-name="P14">And on that day when my strength is fail-ing,</text:p>
      <text:p text:style-name="P14">The end draws near, and my time has come;</text:p>
      <text:p text:style-name="P14">Still my soul will sing Your praise un-end-ing,</text:p>
      <text:p text:style-name="P19"><text:span text:style-name="T15">T</text:span>en thou-sand years, and then for-e-ver-more </text:p>
      <text:p text:style-name="P11"/>
      <text:p text:style-name="P12"><text:span text:style-name="T11">CHORUS </text:span><text:span text:style-name="T7">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0:17:26.026615995</meta:creation-date>
    <dc:date>2026-06-09T21:47:05.930354095</dc:date>
    <meta:editing-duration>PT34M22S</meta:editing-duration>
    <meta:editing-cycles>6</meta:editing-cycles>
    <meta:generator>LibreOffice/25.8.5.2$Linux_X86_64 LibreOffice_project/580$Build-2</meta:generator>
    <meta:document-statistic meta:table-count="0" meta:image-count="0" meta:object-count="0" meta:page-count="1" meta:paragraph-count="26" meta:word-count="151" meta:character-count="790" meta:non-whitespace-character-count="663"/>
  </office:meta>
</office:document-meta>
</file>