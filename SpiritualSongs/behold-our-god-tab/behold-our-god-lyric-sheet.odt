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DejaVu Sans Mono" fo:font-size="15pt" style:font-size-asian="15pt" style:font-size-complex="15pt"/>
    </style:style>
    <style:style style:name="P3" style:family="paragraph" style:parent-style-name="Standard">
      <style:text-properties style:font-name="DejaVu Sans Mono" fo:font-size="15pt" officeooo:paragraph-rsid="000e317f" style:font-size-asian="15pt" style:font-size-complex="15pt"/>
    </style:style>
    <style:style style:name="P4" style:family="paragraph" style:parent-style-name="Standard">
      <style:text-properties style:font-name="DejaVu Sans Mono" fo:font-size="15pt" fo:font-weight="bold" officeooo:rsid="000e317f" officeooo:paragraph-rsid="000e317f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DejaVu Sans Mono" fo:font-size="15pt" fo:font-weight="bold" officeooo:rsid="000e317f" officeooo:paragraph-rsid="00135029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DejaVu Sans Mono" fo:font-size="15pt" officeooo:paragraph-rsid="00135029" style:font-size-asian="15pt" style:font-size-complex="15pt"/>
    </style:style>
    <style:style style:name="P7" style:family="paragraph" style:parent-style-name="Standard">
      <style:text-properties style:font-name="DejaVu Sans Mono" fo:font-size="15pt" officeooo:paragraph-rsid="000ecf03" style:font-size-asian="15pt" style:font-size-complex="15p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none" fo:font-weight="bold" officeooo:rsid="000e317f" style:font-weight-asian="bold" style:font-weight-complex="bold"/>
    </style:style>
    <style:style style:name="T3" style:family="text">
      <style:text-properties fo:font-weight="bold" officeooo:rsid="000e317f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weight="normal" officeooo:rsid="00143106" style:font-size-asian="10pt" style:font-weight-asian="normal" style:font-size-complex="10pt" style:font-weight-complex="normal"/>
    </style:style>
    <style:style style:name="T6" style:family="text">
      <style:text-properties style:text-underline-style="solid" style:text-underline-width="auto" style:text-underline-color="font-color" officeooo:rsid="00143106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position="super 58%" fo:font-weight="bold" officeooo:rsid="000e317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hold Our God</text:p>
      <text:p text:style-name="P2"><text:span text:style-name="T1"/></text:p>
      <text:p text:style-name="P2"><text:span text:style-name="T1">V</text:span><text:span text:style-name="T2">ERSE 1: <text:s/></text:span>Who has held the oceans in His hands?</text:p>
      <text:p text:style-name="P2"><text:s text:c="10"/>Who has numbered every grain of sand?</text:p>
      <text:p text:style-name="P2"><text:s text:c="10"/>Kings and nations tremble at His voice,</text:p>
      <text:p text:style-name="P2"><text:s text:c="10"/>All creation rises to rejoice.<text:line-break/></text:p>
      <text:p text:style-name="P3"><text:span text:style-name="T3">CHORUS: <text:s text:c="2"/></text:span>Behold our God seated on His throne,</text:p>
      <text:p text:style-name="P3"><text:s text:c="10"/>Come let us adore Him!</text:p>
      <text:p text:style-name="P3"><text:s text:c="10"/>Behold our King! Nothing can compare,</text:p>
      <text:p text:style-name="P3"><text:s text:c="10"/>Come, let us adore Him!</text:p>
      <text:p text:style-name="P3"><text:line-break/><text:span text:style-name="T4">V</text:span><text:span text:style-name="T3">ERSE</text:span><text:span text:style-name="T4"> 2: <text:s/></text:span>Who has given counsel to the Lord?</text:p>
      <text:p text:style-name="P2"><text:s text:c="10"/>Who can question any of His words?</text:p>
      <text:p text:style-name="P2"><text:s text:c="10"/>Who can teach the One who knows all things?</text:p>
      <text:p text:style-name="P2"><text:s text:c="10"/>Who can fathom all His wondrous deeds?</text:p>
      <text:p text:style-name="P3"><text:line-break/><text:span text:style-name="T3">CHORUS<text:line-break/><text:line-break/>VERSE 3: <text:s/></text:span>Who has felt the nails upon His hands,</text:p>
      <text:p text:style-name="P2"><text:s text:c="10"/>Bearing all the guilt of sinful man?</text:p>
      <text:p text:style-name="P2"><text:s text:c="10"/>God eternal, humbled to the grave,</text:p>
      <text:p text:style-name="P2"><text:s text:c="10"/>Jesus, Savior, risen now to reign!<text:line-break/></text:p>
      <text:p text:style-name="P4">CHORUS</text:p>
      <text:p text:style-name="P5"/>
      <text:p text:style-name="P5">BRIDGE: <text:span text:style-name="T5">(Note: during split, Ladies come in after Men sing ‘reign’)</text:span></text:p>
      <text:p text:style-name="P5"/>
      <text:p text:style-name="P6"><text:span text:style-name="T6">Unison</text:span><text:span text:style-name="T7">:</text:span> You will reign for-e-ver! (2x)</text:p>
      <text:p text:style-name="P6"><text:span text:style-name="T8">Men</text:span><text:span text:style-name="T7">:</text:span> <text:s text:c="3"/>You will reign for-e-ver! (4x)</text:p>
      <text:p text:style-name="P6"><text:span text:style-name="T8">Ladies</text:span><text:span text:style-name="T7">:</text:span> <text:s text:c="15"/>Let Your glory fill the earth (4x)</text:p>
      <text:p text:style-name="P2"/>
      <text:p text:style-name="P3"><text:span text:style-name="T3">CHORUS x 2: (2</text:span><text:span text:style-name="T9">nd</text:span><text:span text:style-name="T3"> time a cappella)</text:span></text:p>
      <text:p text:style-name="P2"/>
      <text:p text:style-name="P7"><text:s text:c="10"/>Behold our God seated on His throne,</text:p>
      <text:p text:style-name="P7"><text:s text:c="10"/>Come let us adore Him!</text:p>
      <text:p text:style-name="P7"><text:s text:c="10"/>Behold our King! Nothing can compare,</text:p>
      <text:p text:style-name="P7"><text:s text:c="10"/>Come, let us adore Him!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7pt" style:font-size-asian="7pt" style:font-size-complex="7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usic and words by Jonathan Baird, Meghan Baird, Ryan Baird, and Stephen Altrogge © 2011 Sovereign Grace Worship/ASCAP, Sovereign Grace Praise/BMI (adm. by Integrity Music). Sovereign Grace Music, a division of Sovereign Grace Churches. All rights reserved. www.SovereignGraceMusic.org CCLI #5937510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21T23:14:21.805218664</meta:creation-date>
    <dc:date>2026-06-23T23:26:40.729861501</dc:date>
    <meta:editing-duration>PT40M11S</meta:editing-duration>
    <meta:editing-cycles>7</meta:editing-cycles>
    <meta:generator>LibreOffice/25.8.5.2$Linux_X86_64 LibreOffice_project/580$Build-2</meta:generator>
    <meta:print-date>2025-01-21T23:26:10.099093697</meta:print-date>
    <meta:printed-by>PDF files</meta:printed-by>
    <meta:document-statistic meta:table-count="0" meta:image-count="0" meta:object-count="0" meta:page-count="1" meta:paragraph-count="28" meta:word-count="220" meta:character-count="1435" meta:non-whitespace-character-count="1054"/>
  </office:meta>
</office:document-meta>
</file>